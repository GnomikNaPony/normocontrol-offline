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>
    <style:font-face style:name="PT Astra Serif" svg:font-family="PT Astra Serif"/>
    <style:font-face style:name="Symbol" svg:font-family="Symbol"/>
    <style:font-face style:name="Times New Roman" svg:font-family="Times New Roman"/>
    <style:font-face style:name="Times New Roman CYR" svg:font-family="Times New Roman CYR"/>
  </office:font-face-decls>
  <office:automatic-styles>
    <style:style style:family="paragraph" style:name="P20" style:parent-style-name="Standard">
      <style:paragraph-properties fo:line-height="90%" fo:orphans="2" fo:text-align="center" fo:widows="2"/>
      <style:text-properties fo:background-color="transparent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paragraph" style:name="P3" style:parent-style-name="Standard">
      <style:paragraph-properties fo:margin-bottom="11.9906pt" fo:margin-top="11.9906pt" fo:orphans="2" fo:text-align="center" fo:widows="2" loext:contextual-spacing="false"/>
    </style:style>
    <style:style style:family="paragraph" style:name="P28" style:parent-style-name="Standard">
      <style:paragraph-properties fo:margin-left="2.863pt" fo:margin-right="0pt" fo:orphans="2" fo:text-indent="0pt" fo:widows="2"/>
      <style:text-properties fo:background-color="transparent" fo:font-family="Times New Roman" fo:font-size="14pt" fo:font-style="normal" style:font-name="Times New Roman" style:font-size-asian="14pt" style:font-size-complex="14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paragraph" style:list-style-name="" style:name="P7" style:parent-style-name="Heading_2">
      <style:paragraph-properties fo:line-height="90%" fo:margin-left="0pt" fo:margin-right="0pt" fo:orphans="0" fo:text-indent="0pt" fo:widows="0"/>
    </style:style>
    <style:style style:family="paragraph" style:name="P29" style:parent-style-name="Text">
      <style:paragraph-properties fo:line-height="95%" fo:orphans="2" fo:text-align="center" fo:widows="2"/>
    </style:style>
    <style:style style:family="paragraph" style:name="P2" style:parent-style-name="Standard">
      <style:paragraph-properties fo:orphans="2" fo:text-align="center" fo:widows="2"/>
    </style:style>
    <style:style style:family="paragraph" style:name="P6" style:parent-style-name="Standard">
      <style:paragraph-properties fo:orphans="2" fo:text-align="end" fo:widows="2">
        <style:tab-stops>
          <style:tab-stop style:leader-style="none" style:position="117.7229pt" style:type="center"/>
          <style:tab-stop style:leader-style="none" style:position="235.4458pt" style:type="right"/>
        </style:tab-stops>
      </style:paragraph-properties>
    </style:style>
    <style:style style:family="paragraph" style:name="P14" style:parent-style-name="Standard">
      <style:paragraph-properties fo:line-height="90%" fo:orphans="2" fo:text-align="center" fo:widows="2"/>
    </style:style>
    <style:style style:family="paragraph" style:name="P30" style:parent-style-name="Standard">
      <style:paragraph-properties fo:line-height="95%" fo:orphans="2" fo:text-align="center" fo:widows="2"/>
    </style:style>
    <style:style style:family="paragraph" style:name="P34" style:parent-style-name="Heading_7">
      <style:paragraph-properties fo:margin-left="0pt" fo:margin-right="0pt" fo:text-indent="0pt"/>
    </style:style>
    <style:style style:family="paragraph" style:name="P4" style:parent-style-name="Standard">
      <style:paragraph-properties fo:line-height="90%" fo:orphans="2" fo:widows="2"/>
    </style:style>
    <style:style style:family="paragraph" style:master-page-name="Standard" style:name="P1" style:parent-style-name="Heading_4">
      <style:paragraph-properties fo:margin-left="0pt" fo:margin-right="0pt" fo:orphans="2" fo:text-align="center" fo:text-indent="0pt" fo:widows="2" style:page-number="109"/>
    </style:style>
    <style:style style:family="paragraph" style:name="P16" style:parent-style-name="Standard">
      <style:paragraph-properties fo:orphans="2" fo:text-align="center" fo:widows="2"/>
      <style:text-properties fo:background-color="transparent" fo:font-family="Times New Roman" fo:font-size="12pt" style:font-name="Times New Roman" style:font-size-asian="12pt" style:font-size-complex="12pt">
        <co:background-theme-color>
          <value>
            <rgba>00000000</rgba>
          </value>
        </co:background-theme-color>
      </style:text-properties>
    </style:style>
    <style:style co:numbering-list-id="list_1" style:family="paragraph" style:list-level="2" style:list-style-name="numList_1" style:name="P9" style:parent-style-name="Heading_2">
      <style:paragraph-properties fo:orphans="0" fo:widows="0"/>
    </style:style>
    <style:style style:family="paragraph" style:name="P12" style:parent-style-name="Standard">
      <style:paragraph-properties fo:margin-bottom="0pt" fo:margin-right="0pt" fo:margin-top="0pt" fo:orphans="0" fo:text-align="center" fo:widows="0" loext:contextual-spacing="false"/>
    </style:style>
    <style:style style:family="paragraph" style:name="P37" style:parent-style-name="Heading_1">
      <style:paragraph-properties fo:margin-left="0pt" fo:margin-right="0pt" fo:orphans="2" fo:text-align="center" fo:text-indent="0pt" fo:widows="2"/>
    </style:style>
    <style:style style:family="paragraph" style:name="P17" style:parent-style-name="Standard">
      <style:paragraph-properties fo:margin-left="2.863pt" fo:margin-right="0pt" fo:orphans="2" fo:text-indent="0pt" fo:widows="2"/>
      <style:text-properties fo:background-color="transparent" fo:font-style="normal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paragraph" style:name="P5" style:parent-style-name="Standard">
      <style:paragraph-properties fo:orphans="0" fo:text-align="center" fo:widows="0"/>
    </style:style>
    <style:style style:family="paragraph" style:name="P27" style:parent-style-name="Standard">
      <style:paragraph-properties fo:line-height="90%" fo:orphans="2" fo:text-align="center" fo:widows="2"/>
      <style:text-properties fo:background-color="transparent" fo:font-size="12pt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paragraph" style:name="P35" style:parent-style-name="Standard">
      <style:paragraph-properties fo:orphans="2" fo:text-align="center" fo:widows="2"/>
      <style:text-properties fo:background-color="transparent" fo:font-size="12pt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paragraph" style:name="P25" style:parent-style-name="Standard">
      <style:paragraph-properties fo:line-height="90%" fo:orphans="0" fo:text-align="center" fo:widows="0"/>
      <style:text-properties fo:background-color="transparent" fo:font-size="12pt" style:font-size-asian="12pt" style:font-size-complex="12pt">
        <co:background-theme-color>
          <value>
            <rgba>00000000</rgba>
          </value>
        </co:background-theme-color>
      </style:text-properties>
    </style:style>
    <style:style co:numbering-list-id="list_1" style:family="paragraph" style:list-level="7" style:list-style-name="numList_1" style:name="P10" style:parent-style-name="Heading_7">
      <style:paragraph-properties fo:orphans="0" fo:widows="0"/>
    </style:style>
    <style:style style:family="paragraph" style:name="P18" style:parent-style-name="Standard">
      <style:paragraph-properties fo:margin-left="2.863pt" fo:margin-right="0pt" fo:orphans="2" fo:text-indent="0pt" fo:widows="2"/>
    </style:style>
    <style:style style:family="paragraph" style:name="P26" style:parent-style-name="Heading_3">
      <style:paragraph-properties fo:line-height="90%" fo:margin-left="0pt" fo:margin-right="0pt" fo:orphans="2" fo:text-indent="0pt" fo:widows="2"/>
    </style:style>
    <style:style style:family="paragraph" style:name="P15" style:parent-style-name="Heading_2">
      <style:paragraph-properties fo:line-height="90%" fo:margin-left="0pt" fo:margin-right="0pt" fo:orphans="2" fo:text-indent="0pt" fo:widows="2"/>
    </style:style>
    <style:style style:family="paragraph" style:name="P33" style:parent-style-name="Text">
      <style:paragraph-properties fo:orphans="2" fo:text-align="center" fo:widows="2"/>
    </style:style>
    <style:style style:family="paragraph" style:list-style-name="" style:name="P8" style:parent-style-name="Heading_7">
      <style:paragraph-properties fo:margin-left="0pt" fo:margin-right="0pt" fo:orphans="0" fo:text-indent="0pt" fo:widows="0"/>
    </style:style>
    <style:style style:family="paragraph" style:name="P36" style:parent-style-name="Heading_2">
      <style:paragraph-properties fo:margin-left="0pt" fo:margin-right="0pt" fo:text-indent="0pt"/>
    </style:style>
    <style:style style:family="paragraph" style:name="P19" style:parent-style-name="Standard">
      <style:text-properties fo:background-color="transparent">
        <co:background-theme-color>
          <value>
            <rgba>00000000</rgba>
          </value>
        </co:background-theme-color>
      </style:text-properties>
    </style:style>
    <style:style style:family="paragraph" style:name="P11" style:parent-style-name="Table_Contents">
      <style:paragraph-properties fo:orphans="0" fo:text-align="center" fo:widows="0"/>
    </style:style>
    <style:style style:family="paragraph" style:name="P13" style:parent-style-name="Heading_7">
      <style:paragraph-properties fo:line-height="90%" fo:margin-left="0pt" fo:margin-right="0pt" fo:orphans="2" fo:text-indent="0pt" fo:widows="2"/>
    </style:style>
    <style:style style:family="paragraph" style:name="P24" style:parent-style-name="Standard">
      <style:paragraph-properties fo:line-height="90%" fo:orphans="2" fo:text-align="center" fo:widows="2"/>
      <style:text-properties fo:background-color="transparent" fo:font-size="12pt" style:font-size-asian="12pt" style:font-size-complex="12pt" style:text-position="sub 58%">
        <co:background-theme-color>
          <value>
            <rgba>00000000</rgba>
          </value>
        </co:background-theme-color>
      </style:text-properties>
    </style:style>
    <style:style style:family="paragraph" style:name="P23" style:parent-style-name="Standard">
      <style:paragraph-properties fo:line-height="90%" fo:orphans="0" fo:text-align="center" fo:widows="0"/>
    </style:style>
    <style:style style:family="paragraph" style:name="P38" style:parent-style-name="Standard">
      <style:paragraph-properties fo:orphans="2" fo:text-align="center" fo:widows="2"/>
      <style:text-properties fo:background-color="transparent" fo:font-size="12pt" style:font-size-asian="12pt" style:font-size-complex="12pt" style:text-position="sub 58%">
        <co:background-theme-color>
          <value>
            <rgba>00000000</rgba>
          </value>
        </co:background-theme-color>
      </style:text-properties>
    </style:style>
    <style:style style:family="paragraph" style:name="P32" style:parent-style-name="Standard">
      <style:paragraph-properties fo:line-height="95%" fo:orphans="2" fo:text-align="center" fo:widows="2"/>
      <style:text-properties fo:background-color="transparent" fo:font-size="12pt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paragraph" style:name="P21" style:parent-style-name="Standard">
      <style:paragraph-properties fo:margin-left="2.863pt" fo:margin-right="0pt" fo:orphans="2" fo:text-indent="0pt" fo:widows="2"/>
      <style:text-properties fo:background-color="transparent" fo:font-family="Times New Roman" fo:font-size="12pt" fo:font-style="italic" style:font-name="Times New Roman" style:font-size-asian="12pt" style:font-size-complex="12pt" style:font-style-asian="italic" style:font-style-complex="italic">
        <co:background-theme-color>
          <value>
            <rgba>00000000</rgba>
          </value>
        </co:background-theme-color>
      </style:text-properties>
    </style:style>
    <style:style style:family="paragraph" style:name="P31" style:parent-style-name="Heading_7">
      <style:paragraph-properties fo:line-height="95%" fo:margin-left="0pt" fo:margin-right="0pt" fo:orphans="2" fo:text-indent="0pt" fo:widows="2"/>
    </style:style>
    <style:style style:family="paragraph" style:name="P22" style:parent-style-name="Text">
      <style:paragraph-properties fo:line-height="90%" fo:orphans="2" fo:text-align="center" fo:widows="2"/>
    </style:style>
    <style:style style:family="text" style:name="T2">
      <style:text-properties fo:background-color="transparent" fo:font-size="14pt" fo:font-weight="bold" style:font-size-asian="14pt" style:font-size-complex="14pt" style:font-weight-asian="bold" style:font-weight-complex="bold">
        <co:background-theme-color>
          <value>
            <rgba>00000000</rgba>
          </value>
        </co:background-theme-color>
      </style:text-properties>
    </style:style>
    <style:style style:family="text" style:name="T19">
      <style:text-properties fo:background-color="transparent" fo:color="#000000" fo:font-size="12pt" fo:font-style="normal" style:font-size-asian="12pt" style:font-size-complex="12pt" style:font-style-asian="normal" style:font-style-complex="normal" style:text-position="sub 58%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40">
      <style:text-properties fo:background-color="transparent" fo:font-family="Times New Roman" style:font-name="Times New Roman" style:text-position="super 58%">
        <co:background-theme-color>
          <value>
            <rgba>00000000</rgba>
          </value>
        </co:background-theme-color>
      </style:text-properties>
    </style:style>
    <style:style style:family="text" style:name="T36">
      <style:text-properties fo:background-color="transparent" fo:font-size="12pt" style:font-size-asian="12pt" style:font-size-complex="12pt" style:text-position="sub 58%">
        <co:background-theme-color>
          <value>
            <rgba>00000000</rgba>
          </value>
        </co:background-theme-color>
      </style:text-properties>
    </style:style>
    <style:style style:family="text" style:name="T28">
      <style:text-properties fo:background-color="transparent" fo:font-family="Times New Roman" fo:font-size="12pt" fo:font-style="normal" style:font-name="Times New Roman" style:font-size-asian="12pt" style:font-size-complex="12pt" style:font-style-asian="normal" style:font-style-complex="normal" style:text-position="super 58%">
        <co:background-theme-color>
          <value>
            <rgba>00000000</rgba>
          </value>
        </co:background-theme-color>
      </style:text-properties>
    </style:style>
    <style:style style:family="text" style:name="T1">
      <style:text-properties fo:background-color="transparent" fo:font-size="16pt" fo:font-weight="bold" style:font-size-asian="16pt" style:font-size-complex="16pt" style:font-weight-asian="bold" style:font-weight-complex="bold">
        <co:background-theme-color>
          <value>
            <rgba>00000000</rgba>
          </value>
        </co:background-theme-color>
      </style:text-properties>
    </style:style>
    <style:style style:family="text" style:name="T15">
      <style:text-properties fo:background-color="transparent" fo:color="#000000" fo:font-size="12pt" fo:font-style="normal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39">
      <style:text-properties fo:background-color="transparent" fo:font-family="Times New Roman" style:font-name="Times New Roman">
        <co:background-theme-color>
          <value>
            <rgba>00000000</rgba>
          </value>
        </co:background-theme-color>
      </style:text-properties>
    </style:style>
    <style:style style:family="text" style:name="T3">
      <style:text-properties fo:background-color="transparent">
        <co:background-theme-color>
          <value>
            <rgba>00000000</rgba>
          </value>
        </co:background-theme-color>
      </style:text-properties>
    </style:style>
    <style:style style:family="text" style:name="T42">
      <style:text-properties fo:background-color="transparent" style:text-position="sub 58%">
        <co:background-theme-color>
          <value>
            <rgba>00000000</rgba>
          </value>
        </co:background-theme-color>
      </style:text-properties>
    </style:style>
    <style:style style:family="text" style:name="T34">
      <style:text-properties fo:background-color="transparent" fo:font-size="12pt" style:font-size-asian="12pt" style:font-size-complex="12pt" style:text-position="super 58%">
        <co:background-theme-color>
          <value>
            <rgba>00000000</rgba>
          </value>
        </co:background-theme-color>
      </style:text-properties>
    </style:style>
    <style:style style:family="text" style:name="T6">
      <style:text-properties fo:background-color="transparent" fo:font-size="14pt" style:font-size-asian="14pt" style:font-size-complex="14pt">
        <co:background-theme-color>
          <value>
            <rgba>00000000</rgba>
          </value>
        </co:background-theme-color>
      </style:text-properties>
    </style:style>
    <style:style style:family="text" style:name="T37">
      <style:text-properties fo:background-color="transparent" fo:font-family="Symbol" fo:font-size="12pt" style:font-name="Symbol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text" style:name="T14">
      <style:text-properties fo:background-color="transparent" fo:color="#000000" fo:font-family="PT Astra Serif" fo:font-size="12pt" fo:font-style="normal" style:font-name="PT Astra Serif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9">
      <style:text-properties fo:font-family="Times New Roman" fo:font-size="12pt" style:font-name="Times New Roman" style:font-size-asian="12pt" style:font-size-complex="12pt"/>
    </style:style>
    <style:style style:family="text" style:name="T24">
      <style:text-properties fo:background-color="transparent" fo:color="#000000" fo:font-size="12pt" fo:font-style="italic" style:font-size-asian="12pt" style:font-size-complex="12pt" style:font-style-asian="italic" style:font-style-complex="italic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16">
      <style:text-properties fo:background-color="transparent" fo:font-size="12pt" fo:font-style="normal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ext" style:name="T26">
      <style:text-properties fo:background-color="transparent" fo:font-family="Times New Roman" fo:font-style="normal" style:font-name="Times New Roman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ext" style:name="T20">
      <style:text-properties fo:background-color="transparent" fo:color="#000000" fo:font-family="Times New Roman CYR" fo:font-size="12pt" fo:font-style="normal" style:font-name="Times New Roman CYR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4">
      <style:text-properties fo:background-color="transparent" fo:font-size="16pt" fo:font-style="normal" fo:font-weight="bold" style:font-size-asian="16pt" style:font-size-complex="16pt" style:font-style-asian="normal" style:font-style-complex="normal" style:font-weight-asian="bold" style:font-weight-complex="bold">
        <co:background-theme-color>
          <value>
            <rgba>00000000</rgba>
          </value>
        </co:background-theme-color>
      </style:text-properties>
    </style:style>
    <style:style style:family="text" style:name="T11">
      <style:text-properties fo:background-color="transparent" fo:font-family="Times New Roman" fo:font-size="12pt" fo:font-style="italic" fo:font-weight="normal" style:font-name="Times New Roman" style:font-size-asian="12pt" style:font-size-complex="12pt" style:font-style-asian="italic" style:font-style-complex="italic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ext" style:name="T17">
      <style:text-properties fo:background-color="transparent" fo:font-size="12pt" fo:font-style="normal" style:font-size-asian="12pt" style:font-size-complex="12pt" style:font-style-asian="normal" style:font-style-complex="normal" style:text-position="super 58%">
        <co:background-theme-color>
          <value>
            <rgba>00000000</rgba>
          </value>
        </co:background-theme-color>
      </style:text-properties>
    </style:style>
    <style:style style:family="text" style:name="T43">
      <style:text-properties fo:background-color="transparent" style:text-position="super 58%">
        <co:background-theme-color>
          <value>
            <rgba>00000000</rgba>
          </value>
        </co:background-theme-color>
      </style:text-properties>
    </style:style>
    <style:style style:family="text" style:name="T41">
      <style:text-properties fo:background-color="transparent" fo:font-family="Times New Roman" fo:font-weight="normal" style:font-name="Times New Roman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ext" style:name="T21">
      <style:text-properties fo:background-color="transparent" fo:font-style="normal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ext" style:name="T38">
      <style:text-properties fo:background-color="transparent" fo:color="#000000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29">
      <style:text-properties fo:background-color="transparent" fo:font-family="Times New Roman" fo:font-style="italic" style:font-name="Times New Roman" style:font-style-asian="italic" style:font-style-complex="italic">
        <co:background-theme-color>
          <value>
            <rgba>00000000</rgba>
          </value>
        </co:background-theme-color>
      </style:text-properties>
    </style:style>
    <style:style style:family="text" style:name="T7">
      <style:text-properties fo:background-color="transparent" fo:font-size="14pt" fo:letter-spacing="1.8142pt" style:font-size-asian="14pt" style:font-size-complex="14pt">
        <co:background-theme-color>
          <value>
            <rgba>00000000</rgba>
          </value>
        </co:background-theme-color>
      </style:text-properties>
    </style:style>
    <style:style style:family="text" style:name="T30">
      <style:text-properties fo:background-color="transparent" fo:color="#000000" fo:font-family="Times New Roman" fo:font-size="12pt" fo:font-style="italic" style:font-name="Times New Roman" style:font-size-asian="12pt" style:font-size-complex="12pt" style:font-style-asian="italic" style:font-style-complex="italic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8">
      <style:text-properties fo:background-color="transparent" fo:font-family="Times New Roman" fo:font-size="12pt" style:font-name="Times New Roman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text" style:name="T5">
      <style:text-properties fo:background-color="transparent" fo:color="#C9211E" fo:font-size="16pt" fo:font-style="normal" fo:font-weight="bold" style:font-size-asian="16pt" style:font-size-complex="16pt" style:font-style-asian="normal" style:font-style-complex="normal" style:font-weight-asian="bold" style:font-weight-complex="bold">
        <co:background-theme-color>
          <value>
            <rgba>00000000</rgba>
          </value>
        </co:background-theme-color>
        <co:theme-color>
          <value>
            <rgba>C9211EFF</rgba>
          </value>
        </co:theme-color>
      </style:text-properties>
    </style:style>
    <style:style style:family="text" style:name="T13">
      <style:text-properties fo:background-color="transparent" fo:font-family="PT Astra Serif" fo:font-size="12pt" fo:font-style="normal" style:font-name="PT Astra Serif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ext" style:name="T12">
      <style:text-properties fo:background-color="transparent" fo:font-family="Times New Roman" fo:font-size="12pt" fo:font-weight="normal" style:font-name="Times New Roman" style:font-size-asian="12pt" style:font-size-complex="12pt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ext" style:name="T25">
      <style:text-properties fo:background-color="transparent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ext" style:name="T18">
      <style:text-properties fo:background-color="transparent" fo:font-size="12pt" fo:font-style="normal" fo:font-weight="normal" style:font-size-asian="12pt" style:font-size-complex="12pt" style:font-style-asian="normal" style:font-style-complex="normal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ext" style:name="T10">
      <style:text-properties fo:background-color="transparent" fo:font-family="Times New Roman" fo:font-size="12pt" fo:font-style="normal" fo:font-weight="normal" style:font-name="Times New Roman" style:font-size-asian="12pt" style:font-size-complex="12pt" style:font-style-asian="normal" style:font-style-complex="normal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ext" style:name="T22">
      <style:text-properties fo:background-color="transparent" fo:font-size="14pt" fo:font-style="normal" style:font-size-asian="14pt" style:font-size-complex="14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ext" style:name="T27">
      <style:text-properties fo:background-color="transparent" fo:color="#000000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31">
      <style:text-properties fo:background-color="transparent" fo:font-family="Times New Roman" fo:font-size="12pt" fo:font-style="italic" style:font-name="Times New Roman" style:font-size-asian="12pt" style:font-size-complex="12pt" style:font-style-asian="italic" style:font-style-complex="italic">
        <co:background-theme-color>
          <value>
            <rgba>00000000</rgba>
          </value>
        </co:background-theme-color>
      </style:text-properties>
    </style:style>
    <style:style style:family="text" style:name="T35">
      <style:text-properties fo:background-color="transparent" fo:font-weight="normal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ext" style:name="T33">
      <style:text-properties fo:background-color="transparent" fo:font-size="12pt" fo:font-weight="normal" style:font-size-asian="12pt" style:font-size-complex="12pt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ext" style:name="T32">
      <style:text-properties fo:background-color="transparent" fo:font-size="12pt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text" style:name="T23">
      <style:text-properties fo:background-color="transparent" fo:font-family="Times New Roman" fo:font-size="14pt" fo:font-style="normal" style:font-name="Times New Roman" style:font-size-asian="14pt" style:font-size-complex="14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able" style:name="Table5">
      <co:linked-style style-name="Cell30"/>
      <style:table-properties style:width="728.4193pt" table:align="right" table:display="true"/>
    </style:style>
    <style:style style:family="table-cell" style:name="Cell30">
      <co:linked-style style-name="Table5"/>
    </style:style>
    <style:style style:family="table" style:name="Table3">
      <co:linked-style style-name="Cell28"/>
      <style:table-properties style:width="728.5327pt" table:align="right" table:display="true"/>
    </style:style>
    <style:style style:family="table-cell" style:name="Cell28">
      <co:linked-style style-name="Table3"/>
    </style:style>
    <style:style style:family="table" style:name="Table2">
      <co:linked-style style-name="Cell26"/>
      <style:table-properties style:width="728.476pt" table:align="right" table:display="true"/>
    </style:style>
    <style:style style:family="table-cell" style:name="Cell26">
      <co:linked-style style-name="Table2"/>
    </style:style>
    <style:style style:family="table" style:name="Table6">
      <co:linked-style style-name="Cell31"/>
      <style:table-properties style:width="728.4194pt" table:align="right" table:display="true"/>
    </style:style>
    <style:style style:family="table-cell" style:name="Cell31">
      <co:linked-style style-name="Table6"/>
    </style:style>
    <style:style style:family="table" style:name="Table4">
      <co:linked-style style-name="Cell29"/>
      <style:table-properties style:width="728.5044pt" table:align="right" table:display="true"/>
    </style:style>
    <style:style style:family="table-cell" style:name="Cell29">
      <co:linked-style style-name="Table4"/>
    </style:style>
    <style:style style:family="table" style:name="Table1">
      <co:linked-style style-name="Cell1"/>
      <style:table-properties fo:margin-left="4.252pt" style:width="728.476pt" table:align="left" table:display="true"/>
    </style:style>
    <style:style style:family="table-cell" style:name="Cell1">
      <co:linked-style style-name="Table1"/>
    </style:style>
    <style:style style:family="table-column" style:name="Col24">
      <style:table-column-properties style:column-width="62.7874pt" style:use-optimal-column-width="true"/>
    </style:style>
    <style:style style:family="table-column" style:name="Col25">
      <style:table-column-properties style:column-width="57.0615pt" style:use-optimal-column-width="true"/>
    </style:style>
    <style:style style:family="table-column" style:name="Col47">
      <style:table-column-properties style:column-width="59.5559pt" style:use-optimal-column-width="true"/>
    </style:style>
    <style:style style:family="table-column" style:name="Col9">
      <style:table-column-properties style:column-width="69.6473pt" style:use-optimal-column-width="true"/>
    </style:style>
    <style:style style:family="table-column" style:name="Col43">
      <style:table-column-properties style:column-width="78.0095pt" style:use-optimal-column-width="true"/>
    </style:style>
    <style:style style:family="table-column" style:name="Col41">
      <style:table-column-properties style:column-width="67.663pt" style:use-optimal-column-width="true"/>
    </style:style>
    <style:style style:family="table-column" style:name="Col20">
      <style:table-column-properties style:column-width="208.6867pt" style:use-optimal-column-width="true"/>
    </style:style>
    <style:style style:family="table-column" style:name="Col27">
      <style:table-column-properties style:column-width="71.2914pt" style:use-optimal-column-width="true"/>
    </style:style>
    <style:style style:family="table-column" style:name="Col32">
      <style:table-column-properties style:column-width="63.6945pt" style:use-optimal-column-width="true"/>
    </style:style>
    <style:style style:family="table-column" style:name="Col38">
      <style:table-column-properties style:column-width="56.6929pt" style:use-optimal-column-width="true"/>
    </style:style>
    <style:style style:family="table-column" style:name="Col19">
      <style:table-column-properties style:column-width="71.4048pt" style:use-optimal-column-width="true"/>
    </style:style>
    <style:style style:family="table-column" style:name="Col33">
      <style:table-column-properties style:column-width="56.6079pt" style:use-optimal-column-width="true"/>
    </style:style>
    <style:style style:family="table-column" style:name="Col14">
      <style:table-column-properties style:column-width="54.8504pt" style:use-optimal-column-width="true"/>
    </style:style>
    <style:style style:family="table-column" style:name="Col22">
      <style:table-column-properties style:column-width="51.9874pt" style:use-optimal-column-width="true"/>
    </style:style>
    <style:style style:family="table-column" style:name="Col36">
      <style:table-column-properties style:column-width="193.493pt" style:use-optimal-column-width="true"/>
    </style:style>
    <style:style style:family="table-column" style:name="Col5">
      <style:table-column-properties style:column-width="68.0882pt" style:use-optimal-column-width="true"/>
    </style:style>
    <style:style style:family="table-column" style:name="Col35">
      <style:table-column-properties style:column-width="67.8615pt" style:use-optimal-column-width="true"/>
    </style:style>
    <style:style style:family="table-column" style:name="Col34">
      <style:table-column-properties style:column-width="69.9024pt" style:use-optimal-column-width="true"/>
    </style:style>
    <style:style style:family="table-column" style:name="Col1">
      <style:table-column-properties style:column-width="71.4898pt" style:use-optimal-column-width="true"/>
    </style:style>
    <style:style style:family="table-column" style:name="Col10">
      <style:table-column-properties style:column-width="73.7008pt" style:use-optimal-column-width="true"/>
    </style:style>
    <style:style style:family="table-column" style:name="Col28">
      <style:table-column-properties style:column-width="200.1544pt" style:use-optimal-column-width="true"/>
    </style:style>
    <style:style style:family="table-column" style:name="Col13">
      <style:table-column-properties style:column-width="98.1922pt" style:use-optimal-column-width="true"/>
    </style:style>
    <style:style style:family="table-column" style:name="Col26">
      <style:table-column-properties style:column-width="64.3465pt" style:use-optimal-column-width="true"/>
    </style:style>
    <style:style style:family="table-column" style:name="Col8">
      <style:table-column-properties style:column-width="90.5953pt" style:use-optimal-column-width="true"/>
    </style:style>
    <style:style style:family="table-column" style:name="Col16">
      <style:table-column-properties style:column-width="44.0504pt" style:use-optimal-column-width="true"/>
    </style:style>
    <style:style style:family="table-column" style:name="Col44">
      <style:table-column-properties style:column-width="49.5496pt" style:use-optimal-column-width="true"/>
    </style:style>
    <style:style style:family="table-column" style:name="Col45">
      <style:table-column-properties style:column-width="70.8378pt" style:use-optimal-column-width="true"/>
    </style:style>
    <style:style style:family="table-column" style:name="Col15">
      <style:table-column-properties style:column-width="70.7528pt" style:use-optimal-column-width="true"/>
    </style:style>
    <style:style style:family="table-column" style:name="Col31">
      <style:table-column-properties style:column-width="56.9481pt" style:use-optimal-column-width="true"/>
    </style:style>
    <style:style style:family="table-column" style:name="Col12">
      <style:table-column-properties style:column-width="89.4898pt" style:use-optimal-column-width="true"/>
    </style:style>
    <style:style style:family="table-column" style:name="Col7">
      <style:table-column-properties style:column-width="51.3638pt" style:use-optimal-column-width="true"/>
    </style:style>
    <style:style style:family="table-column" style:name="Col17">
      <style:table-column-properties style:column-width="91.2473pt" style:use-optimal-column-width="true"/>
    </style:style>
    <style:style style:family="table-column" style:name="Col46">
      <style:table-column-properties style:column-width="77.9528pt" style:use-optimal-column-width="true"/>
    </style:style>
    <style:style style:family="table-column" style:name="Col4">
      <style:table-column-properties style:column-width="57.0898pt" style:use-optimal-column-width="true"/>
    </style:style>
    <style:style style:family="table-column" style:name="Col42">
      <style:table-column-properties style:column-width="207.6379pt" style:use-optimal-column-width="true"/>
    </style:style>
    <style:style style:family="table-column" style:name="Col2">
      <style:table-column-properties style:column-width="142.5544pt" style:use-optimal-column-width="true"/>
    </style:style>
    <style:style style:family="table-column" style:name="Col30">
      <style:table-column-properties style:column-width="49.8048pt" style:use-optimal-column-width="true"/>
    </style:style>
    <style:style style:family="table-column" style:name="Col6">
      <style:table-column-properties style:column-width="79.0016pt" style:use-optimal-column-width="true"/>
    </style:style>
    <style:style style:family="table-column" style:name="Col18">
      <style:table-column-properties style:column-width="87.1371pt" style:use-optimal-column-width="true"/>
    </style:style>
    <style:style style:family="table-column" style:name="Col39">
      <style:table-column-properties style:column-width="56.6363pt" style:use-optimal-column-width="true"/>
    </style:style>
    <style:style style:family="table-column" style:name="Col11">
      <style:table-column-properties style:column-width="119.0552pt" style:use-optimal-column-width="true"/>
    </style:style>
    <style:style style:family="table-column" style:name="Col3">
      <style:table-column-properties style:column-width="98.6457pt" style:use-optimal-column-width="true"/>
    </style:style>
    <style:style style:family="table-column" style:name="Col29">
      <style:table-column-properties style:column-width="92.2394pt" style:use-optimal-column-width="true"/>
    </style:style>
    <style:style style:family="table-column" style:name="Col40">
      <style:table-column-properties style:column-width="76.904pt" style:use-optimal-column-width="true"/>
    </style:style>
    <style:style style:family="table-column" style:name="Col23">
      <style:table-column-properties style:column-width="59.8961pt" style:use-optimal-column-width="true"/>
    </style:style>
    <style:style style:family="table-column" style:name="Col21">
      <style:table-column-properties style:column-width="81.6095pt" style:use-optimal-column-width="true"/>
    </style:style>
    <style:style style:family="table-column" style:name="Col37">
      <style:table-column-properties style:column-width="92.1544pt" style:use-optimal-column-width="true"/>
    </style:style>
    <style:style style:family="table-row" style:name="Row3">
      <style:table-row-properties style:min-row-height="42.2362pt" style:use-optimal-row-height="true"/>
    </style:style>
    <style:style style:family="table-row" style:name="Row2">
      <style:table-row-properties style:min-row-height="41.6126pt" style:use-optimal-row-height="true"/>
    </style:style>
    <style:style style:family="table-row" style:name="Row1">
      <style:table-row-properties style:min-row-height="41.7544pt" style:use-optimal-row-height="true"/>
    </style:style>
    <style:style style:family="table-row" style:name="Row4">
      <style:table-row-properties style:min-row-height="42.0945pt" style:use-optimal-row-height="true"/>
    </style:style>
    <style:style style:family="table-cell" style:name="Cell22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font-family="PT Astra Serif" fo:font-size="12pt" fo:font-style="normal" style:font-name="PT Astra Serif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able-cell" style:name="Cell2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font-family="Times New Roman" fo:font-size="12pt" style:font-name="Times New Roman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table-cell" style:name="Cell12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color="#000000" fo:font-family="Times New Roman CYR" fo:font-size="12pt" fo:font-style="normal" style:font-name="Times New Roman CYR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able-cell" style:name="Cell25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color="#000000" fo:font-family="Times New Roman" fo:font-size="12pt" fo:font-style="italic" style:font-name="Times New Roman" style:font-size-asian="12pt" style:font-size-complex="12pt" style:font-style-asian="italic" style:font-style-complex="italic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able-cell" style:name="Cell18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color="#000000" fo:font-family="Times New Roman CYR" fo:font-size="12pt" fo:font-style="normal" style:font-name="Times New Roman CYR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able-cell" style:name="Cell5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font-family="Times New Roman" fo:font-size="12pt" style:font-name="Times New Roman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table-cell" style:name="Cell27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font-family="Times New Roman" fo:font-size="12pt" fo:font-weight="normal" style:font-name="Times New Roman" style:font-size-asian="12pt" style:font-size-complex="12pt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able-cell" style:name="Cell13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</style:style>
    <style:style style:family="table-cell" style:name="Cell3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</style:style>
    <style:style style:family="table-cell" style:name="Cell7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style:font-name="Times New Roman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table-cell" style:name="Cell4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style:font-name="Times New Roman" style:font-size-asian="12pt" style:font-size-complex="12pt">
        <co:background-theme-color>
          <value>
            <rgba>00000000</rgba>
          </value>
        </co:background-theme-color>
      </style:text-properties>
    </style:style>
    <style:style style:family="table-cell" style:name="Cell14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</style:style>
    <style:style style:family="table-cell" style:name="Cell17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able-cell" style:name="Cell9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able-cell" style:name="Cell24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color="#000000" fo:font-family="Times New Roman" fo:font-size="12pt" fo:font-style="italic" style:font-name="Times New Roman" style:font-size-asian="12pt" style:font-size-complex="12pt" style:font-style-asian="italic" style:font-style-complex="italic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able-cell" style:name="Cell6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fo:font-weight="normal" style:font-name="Times New Roman" style:font-size-asian="12pt" style:font-size-complex="12pt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able-cell" style:name="Cell19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font-family="PT Astra Serif" fo:font-size="12pt" fo:font-style="normal" style:font-name="PT Astra Serif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able-cell" style:name="Cell20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color="#000000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able-cell" style:name="Cell23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color="#000000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style>
    <style:style style:family="table-cell" style:name="Cell16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fo:font-style="normal" fo:font-weight="normal" style:font-name="Times New Roman" style:font-size-asian="12pt" style:font-size-complex="12pt" style:font-style-asian="normal" style:font-style-complex="normal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able-cell" style:name="Cell11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  <style:text-properties fo:background-color="transparent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able-cell" style:name="Cell21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fo:font-weight="normal" style:font-name="Times New Roman" style:font-size-asian="12pt" style:font-size-complex="12pt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able-cell" style:name="Cell10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fo:font-style="normal" fo:font-weight="normal" style:font-name="Times New Roman" style:font-size-asian="12pt" style:font-size-complex="12pt" style:font-style-asian="normal" style:font-style-complex="normal" style:font-weight-asian="normal" style:font-weight-complex="normal">
        <co:background-theme-color>
          <value>
            <rgba>00000000</rgba>
          </value>
        </co:background-theme-color>
      </style:text-properties>
    </style:style>
    <style:style style:family="table-cell" style:name="Cell15">
      <style:table-cell-properties fo:border-bottom="0.5pt solid #000000" fo:border-left="0.5pt solid #000000" fo:border-right="0.5pt solid #000000" fo:border-top="none" fo:padding-bottom="0pt" fo:padding-left="1.389pt" fo:padding-right="1.389pt" fo:padding-top="0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/>
      <style:text-properties fo:background-color="transparent" fo:font-family="Times New Roman" fo:font-size="12pt" fo:font-style="normal" style:font-name="Times New Roman" style:font-size-asian="12pt" style:font-size-complex="12pt" style:font-style-asian="normal" style:font-style-complex="normal">
        <co:background-theme-color>
          <value>
            <rgba>00000000</rgba>
          </value>
        </co:background-theme-color>
      </style:text-properties>
    </style:style>
    <style:style style:family="table-cell" style:name="Cell8">
      <style:table-cell-properties fo:border-bottom="0.5pt solid #000000" fo:border-left="0.5pt solid #000000" fo:border-right="0.5pt solid #000000" fo:border-top="0.5pt solid #000000" fo:padding-bottom="0pt" fo:padding-left="1.389pt" fo:padding-right="1.389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0pt" fo:padding-left="1.389pt" fo:padding-right="1.389pt" fo:padding-top="0pt"/>
      <style:paragraph-properties fo:text-align="center"/>
    </style:style>
    <style:style style:family="graphic" style:name="Frm3">
      <style:graphic-properties draw:auto-grow-height="false" draw:auto-grow-width="false" draw:fill="solid" draw:fill-color="#FFFFFF" draw:fit-to-size="false" draw:opacity="100%" draw:stroke="none" draw:textarea-horizontal-align="justify" draw:textarea-vertical-align="top" fo:margin-bottom="0pt" fo:margin-left="9.0425pt" fo:margin-right="9.0425pt" fo:margin-top="0pt" fo:padding-bottom="7.2pt" fo:padding-left="3.6pt" fo:padding-right="3.6pt" fo:padding-top="7.2pt" fo:wrap-option="wrap" style:horizontal-pos="from-left" style:horizontal-rel="paragraph" style:mirror="none" style:run-through="background" style:vertical-pos="from-top" style:vertical-rel="paragraph" style:wrap="run-through">
        <co:fill-theme-color>
          <value>
            <rgba>FFFFFFFF</rgba>
          </value>
        </co:fill-theme-color>
      </style:graphic-properties>
    </style:style>
    <style:style style:family="graphic" style:name="Frm1">
      <style:graphic-properties draw:auto-grow-height="false" draw:auto-grow-width="false" draw:fill="solid" draw:fill-color="#FFFFFF" draw:fit-to-size="false" draw:opacity="100%" draw:stroke="none" draw:textarea-horizontal-align="justify" draw:textarea-vertical-align="top" fo:margin-bottom="0pt" fo:margin-left="9.0425pt" fo:margin-right="9.0425pt" fo:margin-top="0pt" fo:padding-bottom="7.2pt" fo:padding-left="3.6pt" fo:padding-right="3.6pt" fo:padding-top="7.2pt" fo:wrap-option="wrap" style:horizontal-pos="from-left" style:horizontal-rel="paragraph" style:mirror="none" style:run-through="background" style:vertical-pos="from-top" style:vertical-rel="paragraph" style:wrap="run-through">
        <co:fill-theme-color>
          <value>
            <rgba>FFFFFFFF</rgba>
          </value>
        </co:fill-theme-color>
      </style:graphic-properties>
    </style:style>
    <style:style style:family="graphic" style:name="Frm2">
      <style:graphic-properties draw:auto-grow-height="false" draw:auto-grow-width="false" draw:fill="solid" draw:fill-color="#FFFFFF" draw:fit-to-size="false" draw:opacity="100%" draw:stroke="none" draw:textarea-horizontal-align="justify" draw:textarea-vertical-align="top" fo:margin-bottom="0pt" fo:margin-left="9.0425pt" fo:margin-right="9.0425pt" fo:margin-top="0pt" fo:padding-bottom="7.2pt" fo:padding-left="3.6pt" fo:padding-right="3.6pt" fo:padding-top="7.2pt" fo:wrap-option="wrap" style:horizontal-pos="from-left" style:horizontal-rel="paragraph" style:mirror="none" style:run-through="background" style:vertical-pos="from-top" style:vertical-rel="paragraph" style:wrap="run-through">
        <co:fill-theme-color>
          <value>
            <rgba>FFFFFFFF</rgba>
          </value>
        </co:fill-theme-color>
      </style:graphic-properties>
    </style:style>
  </office:automatic-styles>
  <office:body>
    <office:text>
      <text:tracked-changes text:track-changes="false"/>
      <text:h co:para-mark-style-name="T1" text:outline-level="4" text:style-name="P1"><text:span text:style-name="T1">Приложение Л</text:span></text:h>
      <text:p co:para-mark-style-name="T2" text:style-name="P2"><text:span text:style-name="T2">(обязательное)</text:span></text:p>
      <text:p co:para-mark-style-name="T3" text:style-name="P3"><text:span text:style-name="T4">Перечень измерительных каналов систем</text:span><text:span text:style-name="T5"><text:s text:c="1"/></text:span><text:span text:style-name="T4">1TB, </text:span><text:span text:style-name="T4">1</text:span><text:span text:style-name="T4">TG</text:span><text:span text:style-name="T4">, 1</text:span><text:span text:style-name="T4">TK</text:span><text:span text:style-name="T4"><text:s text:c="1"/>реакторного отделения</text:span></text:p>
      <text:p co:para-mark-style-name="T6" text:style-name="P4"><text:span text:style-name="T7"><text:s text:c="1"/>Таблица</text:span><text:span text:style-name="T6"><text:s text:c="1"/>Л.1</text:span></text:p>
      <table:table co:columns-count="9" co:grouping-summary-below="true" co:grouping-summary-right="true" co:rows-count="10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column table:style-name="Col9"/>
        <table:table-row>
          <table:table-cell office:value-type="string" table:style-name="Cell2">
            <text:p co:para-mark-style-name="T8" text:style-name="P5"><draw:frame draw:style-name="Frm1" svg:height="153.7796pt" svg:width="30.8126pt" svg:x="735.9595pt" svg:y="243.9498pt" text:anchor-type="paragraph"><draw:text-box><text:p text:style-name="P6"><text:span text:style-name="T9"><text:s text:c="1"/></text:span><text:span text:style-name="T9">ТП.1.КИП.ЦТАИ/179 «зам» </text:span></text:p></draw:text-box></draw:frame><text:span text:style-name="T8">Позиция</text:span></text:p>
            <text:p co:para-mark-style-name="T8" text:style-name="P5"><text:span text:style-name="T8">датчика,</text:span></text:p>
            <text:p co:para-mark-style-name="T8" text:style-name="P5"><text:span text:style-name="T8">пом</text:span></text:p>
          </table:table-cell>
          <table:table-cell office:value-type="string" table:style-name="Cell2">
            <text:p co:para-mark-style-name="T8" text:style-name="P5"><text:span text:style-name="T8">Наименование параметра среды</text:span></text:p>
          </table:table-cell>
          <table:table-cell office:value-type="string" table:style-name="Cell2">
            <text:p co:para-mark-style-name="T8" text:style-name="P5"><text:span text:style-name="T8">Тип датчика, преобразователя, шкала</text:span></text:p>
          </table:table-cell>
          <table:table-cell office:value-type="string" table:style-name="Cell2">
            <text:p co:para-mark-style-name="T8" text:style-name="P5"><text:span text:style-name="T8">Панель</text:span></text:p>
            <text:p co:para-mark-style-name="T8" text:style-name="P5"><text:span text:style-name="T8">КИП, </text:span><text:span text:style-name="T8">НП</text:span></text:p>
          </table:table-cell>
          <table:table-cell office:value-type="string" table:style-name="Cell3">
            <text:h co:para-mark-style-name="T10" text:outline-level="2" text:style-name="P7"><text:span text:style-name="T10">Шкаф РТ</text:span><text:span text:style-name="T11">(ШТС)</text:span><text:span text:style-name="T10">/ место БГРТ</text:span><text:span text:style-name="T11">(АПВ)</text:span></text:h>
          </table:table-cell>
          <table:table-cell office:value-type="string" table:style-name="Cell2">
            <text:p co:para-mark-style-name="T3" text:style-name="P5"><text:span text:style-name="T8">Шкаф УКТС</text:span><text:span text:style-name="T8">/</text:span></text:p>
            <text:p co:para-mark-style-name="T8" text:style-name="P5"><text:span text:style-name="T8">место АДП</text:span></text:p>
          </table:table-cell>
          <table:table-cell office:value-type="string" table:style-name="Cell4">
            <text:h co:para-mark-style-name="T8" text:outline-level="7" text:style-name="P8"><text:span text:style-name="T8">Уставка</text:span></text:h>
            <text:p co:para-mark-style-name="T8" text:style-name="P5"><text:span text:style-name="T8">технол.,</text:span></text:p>
            <text:p co:para-mark-style-name="T8" text:style-name="P5"><text:span text:style-name="T8">ºС</text:span></text:p>
          </table:table-cell>
          <table:table-cell office:value-type="string" table:style-name="Cell2">
            <text:p co:para-mark-style-name="T8" text:style-name="P5"><text:span text:style-name="T8">Функциональное</text:span></text:p>
            <text:p co:para-mark-style-name="T8" text:style-name="P5"><text:span text:style-name="T8">назначение</text:span></text:p>
          </table:table-cell>
          <table:table-cell office:value-type="string" table:style-name="Cell2">
            <text:p co:para-mark-style-name="T8" text:style-name="P5"><text:span text:style-name="T8">Примечание</text:span></text:p>
          </table:table-cell>
        </table:table-row>
        <table:table-row>
          <table:table-cell office:value-type="string" table:style-name="Cell5">
            <text:p co:para-mark-style-name="T8" text:style-name="P5"><text:span text:style-name="T8">1</text:span></text:p>
          </table:table-cell>
          <table:table-cell office:value-type="string" table:style-name="Cell5">
            <text:p co:para-mark-style-name="T8" text:style-name="P5"><text:span text:style-name="T8">2</text:span></text:p>
          </table:table-cell>
          <table:table-cell office:value-type="string" table:style-name="Cell5">
            <text:p co:para-mark-style-name="T8" text:style-name="P5"><text:span text:style-name="T8">3</text:span></text:p>
          </table:table-cell>
          <table:table-cell office:value-type="string" table:style-name="Cell5">
            <text:p co:para-mark-style-name="T8" text:style-name="P5"><text:span text:style-name="T8">4</text:span></text:p>
          </table:table-cell>
          <table:table-cell office:value-type="string" table:style-name="Cell6">
            <text:list text:style-name="numList_1" xml:id="list_1">
              <text:list-item>
                <text:list>
                  <text:list-item>
                    <text:h co:para-mark-style-name="T12" text:outline-level="2" text:style-name="P9"><text:span text:style-name="T12">5</text:span></text:h>
                  </text:list-item>
                </text:list>
              </text:list-item>
            </text:list>
          </table:table-cell>
          <table:table-cell office:value-type="string" table:style-name="Cell5">
            <text:p co:para-mark-style-name="T8" text:style-name="P5"><text:span text:style-name="T8">6</text:span></text:p>
          </table:table-cell>
          <table:table-cell office:value-type="string" table:style-name="Cell7">
            <text:list text:continue-list="list_1" text:style-name="numList_1" xml:id="list_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co:para-mark-style-name="T8" text:outline-level="7" text:style-name="P10"><text:span text:style-name="T8">7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 table:style-name="Cell5">
            <text:p co:para-mark-style-name="T8" text:style-name="P5"><text:span text:style-name="T8">8</text:span></text:p>
          </table:table-cell>
          <table:table-cell office:value-type="string" table:style-name="Cell5">
            <text:p co:para-mark-style-name="T8" text:style-name="P5"><text:span text:style-name="T8">9</text:span></text:p>
          </table:table-cell>
        </table:table-row>
        <table:table-row>
          <table:table-cell office:value-type="string" table:style-name="Cell8">
            <text:p co:para-mark-style-name="T13" text:style-name="P11"><text:span text:style-name="T13">1TB10T01B1</text:span></text:p>
            <text:p co:para-mark-style-name="T14" text:style-name="P12"><text:span text:style-name="T14">1А034</text:span></text:p>
          </table:table-cell>
          <table:table-cell office:value-type="string" table:style-name="Cell8">
            <text:p co:para-mark-style-name="T3" text:style-name="P12"><text:span text:style-name="T14">«</text:span><text:span text:style-name="T14">T</text:span><text:span text:style-name="T14">»</text:span><text:span text:style-name="T15"><text:s text:c="1"/>первого подшипника насоса 1TB10D02</text:span></text:p>
          </table:table-cell>
          <table:table-cell office:value-type="string" table:style-name="Cell3">
            <text:h co:para-mark-style-name="T16" text:outline-level="7" text:style-name="P13"><text:span text:style-name="T16">ТС-1388А гр. 50П</text:span></text:h>
            <text:p co:para-mark-style-name="T16" text:style-name="P14"><text:span text:style-name="T16">ИРТ 1730D/A </text:span></text:p>
            <text:p co:para-mark-style-name="T3" text:style-name="P14"><text:span text:style-name="T16">(0-100) </text:span><text:span text:style-name="T17">о</text:span><text:span text:style-name="T16">С</text:span></text:p>
          </table:table-cell>
          <table:table-cell office:value-type="string" table:style-name="Cell9">
            <text:h co:para-mark-style-name="T3" text:outline-level="7" text:style-name="P13"><text:span text:style-name="T16">1</text:span><text:span text:style-name="T16">HZ</text:span><text:span text:style-name="T16">05</text:span></text:h>
          </table:table-cell>
          <table:table-cell office:value-type="string" table:style-name="Cell10">
            <text:h co:para-mark-style-name="T3" text:outline-level="2" text:style-name="P15"><text:span text:style-name="T18">1</text:span><text:span text:style-name="T18">HZ79</text:span><text:span text:style-name="T18">/38</text:span></text:h>
          </table:table-cell>
          <table:table-cell office:value-type="string" table:style-name="Cell8">
            <text:p co:para-mark-style-name="T3" text:style-name="P12"><text:span text:style-name="T15">1HZ87/26</text:span><text:span text:style-name="T19">(1)</text:span></text:p>
          </table:table-cell>
          <table:table-cell office:value-type="string" table:style-name="Cell11">
            <text:p co:para-mark-style-name="T16" text:style-name="P14"><text:span text:style-name="T16">Т &gt; 80</text:span></text:p>
          </table:table-cell>
          <table:table-cell office:value-type="string" table:style-name="Cell12">
            <text:p co:para-mark-style-name="T20" text:style-name="P12"><text:span text:style-name="T20">TBF01</text:span></text:p>
            <text:p co:para-mark-style-name="T20" text:style-name="P12"><text:span text:style-name="T20">ИВС</text:span></text:p>
          </table:table-cell>
          <table:table-cell office:value-type="string" table:style-name="Cell8">
            <text:p co:para-mark-style-name="T8" text:style-name="P16"/>
          </table:table-cell>
        </table:table-row>
        <table:table-row>
          <table:table-cell office:value-type="string" table:style-name="Cell8">
            <text:p co:para-mark-style-name="T13" text:style-name="P11"><text:span text:style-name="T13">1TB10T02B1</text:span></text:p>
            <text:p co:para-mark-style-name="T14" text:style-name="P12"><text:span text:style-name="T14">1А034</text:span></text:p>
          </table:table-cell>
          <table:table-cell office:value-type="string" table:style-name="Cell8">
            <text:p co:para-mark-style-name="T3" text:style-name="P12"><text:span text:style-name="T14">«</text:span><text:span text:style-name="T14">T</text:span><text:span text:style-name="T14">»</text:span><text:span text:style-name="T15"><text:s text:c="1"/>второго подшипника насоса 1TB10D02</text:span></text:p>
          </table:table-cell>
          <table:table-cell office:value-type="string" table:style-name="Cell3">
            <text:h co:para-mark-style-name="T16" text:outline-level="7" text:style-name="P13"><text:span text:style-name="T16">ТС-1388А гр. 50П</text:span></text:h>
            <text:p co:para-mark-style-name="T16" text:style-name="P14"><text:span text:style-name="T16">ИРТ 1730D/A </text:span></text:p>
            <text:p co:para-mark-style-name="T3" text:style-name="P14"><text:span text:style-name="T16">(0-100) </text:span><text:span text:style-name="T17">о</text:span><text:span text:style-name="T16">С</text:span></text:p>
          </table:table-cell>
          <table:table-cell office:value-type="string" table:style-name="Cell9">
            <text:h co:para-mark-style-name="T3" text:outline-level="7" text:style-name="P13"><text:span text:style-name="T16">1</text:span><text:span text:style-name="T16">HZ</text:span><text:span text:style-name="T16">05</text:span></text:h>
          </table:table-cell>
          <table:table-cell office:value-type="string" table:style-name="Cell10">
            <text:h co:para-mark-style-name="T3" text:outline-level="2" text:style-name="P15"><text:span text:style-name="T18">1</text:span><text:span text:style-name="T18">HZ79</text:span><text:span text:style-name="T18">/39</text:span></text:h>
          </table:table-cell>
          <table:table-cell office:value-type="string" table:style-name="Cell8">
            <text:p co:para-mark-style-name="T3" text:style-name="P12"><text:span text:style-name="T15">1HZ87/26</text:span><text:span text:style-name="T19">(2)</text:span></text:p>
          </table:table-cell>
          <table:table-cell office:value-type="string" table:style-name="Cell11">
            <text:p co:para-mark-style-name="T16" text:style-name="P14"><text:span text:style-name="T16">Т &gt; 80</text:span></text:p>
          </table:table-cell>
          <table:table-cell office:value-type="string" table:style-name="Cell12">
            <text:p co:para-mark-style-name="T20" text:style-name="P12"><text:span text:style-name="T20">TBF01</text:span></text:p>
            <text:p co:para-mark-style-name="T20" text:style-name="P12"><text:span text:style-name="T20">ИВС</text:span></text:p>
          </table:table-cell>
          <table:table-cell office:value-type="string" table:style-name="Cell8">
            <text:p co:para-mark-style-name="T8" text:style-name="P16"/>
          </table:table-cell>
        </table:table-row>
        <table:table-row>
          <table:table-cell office:value-type="string" table:style-name="Cell8">
            <text:p co:para-mark-style-name="T13" text:style-name="P11"><text:span text:style-name="T13">1TB10T03B1</text:span></text:p>
            <text:p co:para-mark-style-name="T14" text:style-name="P12"><text:span text:style-name="T14">1А034</text:span></text:p>
          </table:table-cell>
          <table:table-cell office:value-type="string" table:style-name="Cell8">
            <text:p co:para-mark-style-name="T3" text:style-name="P12"><text:span text:style-name="T14">«</text:span><text:span text:style-name="T14">T</text:span><text:span text:style-name="T14">»</text:span><text:span text:style-name="T15"><text:s text:c="1"/>первого подшипника насоса 1TB10D03</text:span></text:p>
          </table:table-cell>
          <table:table-cell office:value-type="string" table:style-name="Cell3">
            <text:h co:para-mark-style-name="T16" text:outline-level="7" text:style-name="P13"><text:span text:style-name="T16">ТС-1388А гр. 50П</text:span></text:h>
            <text:p co:para-mark-style-name="T16" text:style-name="P14"><text:span text:style-name="T16">ИРТ 1730D/A </text:span></text:p>
            <text:p co:para-mark-style-name="T3" text:style-name="P14"><text:span text:style-name="T16">(0-100) </text:span><text:span text:style-name="T17">о</text:span><text:span text:style-name="T16">С</text:span></text:p>
          </table:table-cell>
          <table:table-cell office:value-type="string" table:style-name="Cell9">
            <text:h co:para-mark-style-name="T3" text:outline-level="7" text:style-name="P13"><text:span text:style-name="T16">1</text:span><text:span text:style-name="T16">HZ</text:span><text:span text:style-name="T16">05</text:span></text:h>
          </table:table-cell>
          <table:table-cell office:value-type="string" table:style-name="Cell10">
            <text:h co:para-mark-style-name="T3" text:outline-level="2" text:style-name="P15"><text:span text:style-name="T18">1</text:span><text:span text:style-name="T18">HZ79</text:span><text:span text:style-name="T18">/42</text:span></text:h>
          </table:table-cell>
          <table:table-cell office:value-type="string" table:style-name="Cell8">
            <text:p co:para-mark-style-name="T3" text:style-name="P12"><text:span text:style-name="T15">1HZ87/30</text:span><text:span text:style-name="T19">(1)</text:span></text:p>
          </table:table-cell>
          <table:table-cell office:value-type="string" table:style-name="Cell11">
            <text:p co:para-mark-style-name="T16" text:style-name="P14"><text:span text:style-name="T16">Т &gt; 80</text:span></text:p>
          </table:table-cell>
          <table:table-cell office:value-type="string" table:style-name="Cell12">
            <text:p co:para-mark-style-name="T20" text:style-name="P12"><text:span text:style-name="T20">TBF01</text:span></text:p>
            <text:p co:para-mark-style-name="T20" text:style-name="P12"><text:span text:style-name="T20">ИВС</text:span></text:p>
          </table:table-cell>
          <table:table-cell office:value-type="string" table:style-name="Cell8">
            <text:p co:para-mark-style-name="T8" text:style-name="P16"/>
          </table:table-cell>
        </table:table-row>
        <table:table-row>
          <table:table-cell office:value-type="string" table:style-name="Cell13">
            <text:p co:para-mark-style-name="T13" text:style-name="P11"><text:span text:style-name="T13">1TB10T04B1</text:span></text:p>
            <text:p co:para-mark-style-name="T14" text:style-name="P12"><text:span text:style-name="T14">1А034</text:span></text:p>
          </table:table-cell>
          <table:table-cell office:value-type="string" table:style-name="Cell13">
            <text:p co:para-mark-style-name="T3" text:style-name="P12"><text:span text:style-name="T14">«</text:span><text:span text:style-name="T14">T</text:span><text:span text:style-name="T14">»</text:span><text:span text:style-name="T15"><text:s text:c="1"/>второго подшипника насоса 1TB10D03</text:span></text:p>
          </table:table-cell>
          <table:table-cell office:value-type="string" table:style-name="Cell14">
            <text:h co:para-mark-style-name="T16" text:outline-level="7" text:style-name="P13"><text:span text:style-name="T16">ТС-1388А гр. 50П</text:span></text:h>
            <text:p co:para-mark-style-name="T16" text:style-name="P14"><text:span text:style-name="T16">ИРТ 1730D/A </text:span></text:p>
            <text:p co:para-mark-style-name="T3" text:style-name="P14"><text:span text:style-name="T16">(0-100) </text:span><text:span text:style-name="T17">о</text:span><text:span text:style-name="T16">С</text:span></text:p>
          </table:table-cell>
          <table:table-cell office:value-type="string" table:style-name="Cell15">
            <text:h co:para-mark-style-name="T3" text:outline-level="7" text:style-name="P13"><text:span text:style-name="T16">1</text:span><text:span text:style-name="T16">HZ</text:span><text:span text:style-name="T16">05</text:span></text:h>
          </table:table-cell>
          <table:table-cell office:value-type="string" table:style-name="Cell16">
            <text:h co:para-mark-style-name="T3" text:outline-level="2" text:style-name="P15"><text:span text:style-name="T18">1</text:span><text:span text:style-name="T18">HZ79</text:span><text:span text:style-name="T18">/43</text:span></text:h>
          </table:table-cell>
          <table:table-cell office:value-type="string" table:style-name="Cell13">
            <text:p co:para-mark-style-name="T3" text:style-name="P12"><text:span text:style-name="T15">1HZ87/30</text:span><text:span text:style-name="T19">(2)</text:span></text:p>
          </table:table-cell>
          <table:table-cell office:value-type="string" table:style-name="Cell17">
            <text:p co:para-mark-style-name="T16" text:style-name="P14"><text:span text:style-name="T16">Т &gt; 80</text:span></text:p>
          </table:table-cell>
          <table:table-cell office:value-type="string" table:style-name="Cell18">
            <text:p co:para-mark-style-name="T20" text:style-name="P12"><text:span text:style-name="T20">TB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3">
            <text:p co:para-mark-style-name="T13" text:style-name="P11"><text:span text:style-name="T13">1TB10T05B1</text:span></text:p>
            <text:p co:para-mark-style-name="T14" text:style-name="P12"><text:span text:style-name="T14">1А034</text:span></text:p>
          </table:table-cell>
          <table:table-cell office:value-type="string" table:style-name="Cell13">
            <text:p co:para-mark-style-name="T3" text:style-name="P12"><text:span text:style-name="T14">«</text:span><text:span text:style-name="T14">T</text:span><text:span text:style-name="T14">»</text:span><text:span text:style-name="T15"><text:s text:c="1"/>первого подшипника насоса 1TB10D04</text:span></text:p>
          </table:table-cell>
          <table:table-cell office:value-type="string" table:style-name="Cell14">
            <text:h co:para-mark-style-name="T16" text:outline-level="7" text:style-name="P13"><text:span text:style-name="T16">ТС-1388А гр. 50П</text:span></text:h>
            <text:p co:para-mark-style-name="T16" text:style-name="P14"><text:span text:style-name="T16">ИРТ 1730D/A </text:span></text:p>
            <text:p co:para-mark-style-name="T3" text:style-name="P14"><text:span text:style-name="T16">(0-100) </text:span><text:span text:style-name="T17">о</text:span><text:span text:style-name="T16">С</text:span></text:p>
          </table:table-cell>
          <table:table-cell office:value-type="string" table:style-name="Cell15">
            <text:h co:para-mark-style-name="T3" text:outline-level="7" text:style-name="P13"><text:span text:style-name="T16">1</text:span><text:span text:style-name="T16">HZ</text:span><text:span text:style-name="T16">05</text:span></text:h>
          </table:table-cell>
          <table:table-cell office:value-type="string" table:style-name="Cell16">
            <text:h co:para-mark-style-name="T3" text:outline-level="2" text:style-name="P15"><text:span text:style-name="T18">1</text:span><text:span text:style-name="T18">HZ79</text:span><text:span text:style-name="T18">/46</text:span></text:h>
          </table:table-cell>
          <table:table-cell office:value-type="string" table:style-name="Cell13">
            <text:p co:para-mark-style-name="T3" text:style-name="P12"><text:span text:style-name="T15">1HZ87/34</text:span><text:span text:style-name="T19">(1)</text:span></text:p>
          </table:table-cell>
          <table:table-cell office:value-type="string" table:style-name="Cell17">
            <text:p co:para-mark-style-name="T16" text:style-name="P14"><text:span text:style-name="T16">Т &gt; 80</text:span></text:p>
          </table:table-cell>
          <table:table-cell office:value-type="string" table:style-name="Cell18">
            <text:p co:para-mark-style-name="T20" text:style-name="P12"><text:span text:style-name="T20">TB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3">
            <text:p co:para-mark-style-name="T13" text:style-name="P11"><text:span text:style-name="T13">1TB10T06B1</text:span></text:p>
            <text:p co:para-mark-style-name="T14" text:style-name="P12"><text:span text:style-name="T14">1А034</text:span></text:p>
          </table:table-cell>
          <table:table-cell office:value-type="string" table:style-name="Cell13">
            <text:p co:para-mark-style-name="T3" text:style-name="P12"><text:span text:style-name="T14">«</text:span><text:span text:style-name="T14">T</text:span><text:span text:style-name="T14">»</text:span><text:span text:style-name="T15"><text:s text:c="1"/>второго подшипника насоса 1TB10D04</text:span></text:p>
          </table:table-cell>
          <table:table-cell office:value-type="string" table:style-name="Cell14">
            <text:h co:para-mark-style-name="T16" text:outline-level="7" text:style-name="P13"><text:span text:style-name="T16">ТС-1388А гр. 50П</text:span></text:h>
            <text:p co:para-mark-style-name="T16" text:style-name="P14"><text:span text:style-name="T16">ИРТ 1730D/A </text:span></text:p>
            <text:p co:para-mark-style-name="T3" text:style-name="P14"><text:span text:style-name="T16">(0-100) </text:span><text:span text:style-name="T17">о</text:span><text:span text:style-name="T16">С</text:span></text:p>
          </table:table-cell>
          <table:table-cell office:value-type="string" table:style-name="Cell15">
            <text:h co:para-mark-style-name="T3" text:outline-level="7" text:style-name="P13"><text:span text:style-name="T16">1</text:span><text:span text:style-name="T16">HZ</text:span><text:span text:style-name="T16">05</text:span></text:h>
          </table:table-cell>
          <table:table-cell office:value-type="string" table:style-name="Cell16">
            <text:h co:para-mark-style-name="T3" text:outline-level="2" text:style-name="P15"><text:span text:style-name="T18">1</text:span><text:span text:style-name="T18">HZ79</text:span><text:span text:style-name="T18">/47</text:span></text:h>
          </table:table-cell>
          <table:table-cell office:value-type="string" table:style-name="Cell13">
            <text:p co:para-mark-style-name="T3" text:style-name="P12"><text:span text:style-name="T15">1HZ87/34</text:span><text:span text:style-name="T19">(2)</text:span></text:p>
          </table:table-cell>
          <table:table-cell office:value-type="string" table:style-name="Cell17">
            <text:p co:para-mark-style-name="T16" text:style-name="P14"><text:span text:style-name="T16">Т &gt; 80</text:span></text:p>
          </table:table-cell>
          <table:table-cell office:value-type="string" table:style-name="Cell18">
            <text:p co:para-mark-style-name="T20" text:style-name="P12"><text:span text:style-name="T20">TB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01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подшипника двигателя со стороны свобод. конца вала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15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25</text:span></text:p>
          </table:table-cell>
          <table:table-cell office:value-type="string" table:style-name="Cell20">
            <text:p co:para-mark-style-name="T15" text:style-name="P12"><text:span text:style-name="T15">1HV81/15</text:span></text:p>
          </table:table-cell>
          <table:table-cell office:value-type="string" table:style-name="Cell17">
            <text:p co:para-mark-style-name="T16" text:style-name="P14"><text:span text:style-name="T16">Т &gt; 90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02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подшипника двигателя со стороны свобод. конца вала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15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26</text:span></text:p>
          </table:table-cell>
          <table:table-cell office:value-type="string" table:style-name="Cell20">
            <text:p co:para-mark-style-name="T15" text:style-name="P12"><text:span text:style-name="T15">1HV81/16</text:span></text:p>
          </table:table-cell>
          <table:table-cell office:value-type="string" table:style-name="Cell17">
            <text:p co:para-mark-style-name="T16" text:style-name="P14"><text:span text:style-name="T16">Т &gt; 90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</table:table>
      <text:p co:para-mark-style-name="T21" text:style-name="P17"/>
      <text:p co:para-mark-style-name="T22" text:style-name="P18"><draw:frame draw:style-name="Frm2" svg:height="153.7796pt" svg:width="30.8126pt" svg:x="740.5516pt" svg:y="335.1971pt" text:anchor-type="paragraph"><draw:text-box><text:p text:style-name="P6"><text:span text:style-name="T9"><text:s text:c="1"/></text:span><text:span text:style-name="T9">ТП.1.КИП.ЦТАИ/179 «зам» </text:span></text:p></draw:text-box></draw:frame><text:span text:style-name="T23">Продолжение таблицы </text:span><text:span text:style-name="T23">Л</text:span><text:span text:style-name="T23">.</text:span><text:span text:style-name="T23">1</text:span></text:p>
      <table:table co:columns-count="9" co:grouping-summary-below="true" co:grouping-summary-right="true" co:rows-count="12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column table:style-name="Col9"/>
        <table:table-row>
          <table:table-cell office:value-type="string" table:style-name="Cell2">
            <text:p co:para-mark-style-name="T8" text:style-name="P5"><text:span text:style-name="T8">1</text:span></text:p>
          </table:table-cell>
          <table:table-cell office:value-type="string" table:style-name="Cell2">
            <text:p co:para-mark-style-name="T8" text:style-name="P5"><text:span text:style-name="T8">2</text:span></text:p>
          </table:table-cell>
          <table:table-cell office:value-type="string" table:style-name="Cell2">
            <text:p co:para-mark-style-name="T8" text:style-name="P5"><text:span text:style-name="T8">3</text:span></text:p>
          </table:table-cell>
          <table:table-cell office:value-type="string" table:style-name="Cell2">
            <text:p co:para-mark-style-name="T8" text:style-name="P5"><text:span text:style-name="T8">4</text:span></text:p>
          </table:table-cell>
          <table:table-cell office:value-type="string" table:style-name="Cell21">
            <text:list text:continue-list="list_1" text:style-name="numList_1" xml:id="list_3">
              <text:list-item>
                <text:list>
                  <text:list-item>
                    <text:h co:para-mark-style-name="T12" text:outline-level="2" text:style-name="P9"><text:span text:style-name="T12">5</text:span></text:h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6</text:span></text:p>
          </table:table-cell>
          <table:table-cell office:value-type="string" table:style-name="Cell4">
            <text:list text:continue-list="list_1" text:style-name="numList_1" xml:id="list_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co:para-mark-style-name="T8" text:outline-level="7" text:style-name="P10"><text:span text:style-name="T8">7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8</text:span></text:p>
          </table:table-cell>
          <table:table-cell office:value-type="string" table:style-name="Cell2">
            <text:p co:para-mark-style-name="T8" text:style-name="P5"><text:span text:style-name="T8">9</text:span></text:p>
          </table:table-cell>
        </table:table-row>
        <table:table-row>
          <table:table-cell office:value-type="string" table:style-name="Cell22">
            <text:p co:para-mark-style-name="T13" text:style-name="P11"><text:span text:style-name="T13">1TG11T03B1</text:span></text:p>
            <text:p co:para-mark-style-name="T13" text:style-name="P11"><text:span text:style-name="T13">1А123/1</text:span></text:p>
          </table:table-cell>
          <table:table-cell office:value-type="string" table:style-name="Cell8">
            <text:p co:para-mark-style-name="T3" text:style-name="P11"><text:span text:style-name="T14">«</text:span><text:span text:style-name="T14">T</text:span><text:span text:style-name="T14">»</text:span><text:span text:style-name="T13"><text:s text:c="1"/>подшипника двигателя со стороны свобод. конца вала 1TG11D01</text:span></text:p>
          </table:table-cell>
          <table:table-cell office:value-type="string" table:style-name="Cell8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150) </text:span><text:span text:style-name="T17">о</text:span><text:span text:style-name="T16">С</text:span></text:p>
          </table:table-cell>
          <table:table-cell office:value-type="string" table:style-name="Cell11">
            <text:p co:para-mark-style-name="T16" text:style-name="P14"><text:span text:style-name="T16">1HV13</text:span></text:p>
          </table:table-cell>
          <table:table-cell office:value-type="string" table:style-name="Cell23">
            <text:p co:para-mark-style-name="T3" text:style-name="P12"><text:span text:style-name="T15">1</text:span><text:span text:style-name="T15">HV34/27</text:span></text:p>
          </table:table-cell>
          <table:table-cell office:value-type="string" table:style-name="Cell23">
            <text:p co:para-mark-style-name="T15" text:style-name="P12"><text:span text:style-name="T15">1HV81/20</text:span></text:p>
          </table:table-cell>
          <table:table-cell office:value-type="string" table:style-name="Cell11">
            <text:p co:para-mark-style-name="T16" text:style-name="P14"><text:span text:style-name="T16">Т &gt; 90</text:span></text:p>
          </table:table-cell>
          <table:table-cell office:value-type="string" table:style-name="Cell12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8">
            <text:p co:para-mark-style-name="T8" text:style-name="P16"/>
          </table:table-cell>
        </table:table-row>
        <table:table-row>
          <table:table-cell office:value-type="string" table:style-name="Cell22">
            <text:p co:para-mark-style-name="T13" text:style-name="P11"><text:span text:style-name="T13">1TG11T04B1</text:span></text:p>
            <text:p co:para-mark-style-name="T13" text:style-name="P11"><text:span text:style-name="T13">1А123/1</text:span></text:p>
          </table:table-cell>
          <table:table-cell office:value-type="string" table:style-name="Cell8">
            <text:p co:para-mark-style-name="T3" text:style-name="P11"><text:span text:style-name="T14">«</text:span><text:span text:style-name="T14">T</text:span><text:span text:style-name="T14">»</text:span><text:span text:style-name="T13"><text:s text:c="1"/>подшипника двигателя со стороны насоса 1TG11D01</text:span></text:p>
          </table:table-cell>
          <table:table-cell office:value-type="string" table:style-name="Cell8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150) </text:span><text:span text:style-name="T17">о</text:span><text:span text:style-name="T16">С</text:span></text:p>
          </table:table-cell>
          <table:table-cell office:value-type="string" table:style-name="Cell11">
            <text:p co:para-mark-style-name="T16" text:style-name="P14"><text:span text:style-name="T16">1HV13</text:span></text:p>
          </table:table-cell>
          <table:table-cell office:value-type="string" table:style-name="Cell23">
            <text:p co:para-mark-style-name="T3" text:style-name="P12"><text:span text:style-name="T15">1</text:span><text:span text:style-name="T15">HV34/28</text:span></text:p>
          </table:table-cell>
          <table:table-cell office:value-type="string" table:style-name="Cell23">
            <text:p co:para-mark-style-name="T15" text:style-name="P12"><text:span text:style-name="T15">1HV81/9</text:span></text:p>
          </table:table-cell>
          <table:table-cell office:value-type="string" table:style-name="Cell11">
            <text:p co:para-mark-style-name="T16" text:style-name="P14"><text:span text:style-name="T16">Т &gt; 90</text:span></text:p>
          </table:table-cell>
          <table:table-cell office:value-type="string" table:style-name="Cell12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8">
            <text:p co:para-mark-style-name="T8" text:style-name="P16"/>
          </table:table-cell>
        </table:table-row>
        <table:table-row>
          <table:table-cell office:value-type="string" table:style-name="Cell22">
            <text:p co:para-mark-style-name="T13" text:style-name="P11"><text:span text:style-name="T13">1TG11T05B1</text:span></text:p>
            <text:p co:para-mark-style-name="T13" text:style-name="P11"><text:span text:style-name="T13">1А123/1</text:span></text:p>
          </table:table-cell>
          <table:table-cell office:value-type="string" table:style-name="Cell8">
            <text:p co:para-mark-style-name="T3" text:style-name="P11"><text:span text:style-name="T14">«</text:span><text:span text:style-name="T14">T</text:span><text:span text:style-name="T14">»</text:span><text:span text:style-name="T13"><text:s text:c="1"/>подшипника двигателя со стороны насоса 1TG11D01</text:span></text:p>
          </table:table-cell>
          <table:table-cell office:value-type="string" table:style-name="Cell8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150) </text:span><text:span text:style-name="T17">о</text:span><text:span text:style-name="T16">С</text:span></text:p>
          </table:table-cell>
          <table:table-cell office:value-type="string" table:style-name="Cell11">
            <text:p co:para-mark-style-name="T16" text:style-name="P14"><text:span text:style-name="T16">1HV13</text:span></text:p>
          </table:table-cell>
          <table:table-cell office:value-type="string" table:style-name="Cell23">
            <text:p co:para-mark-style-name="T3" text:style-name="P12"><text:span text:style-name="T15">1</text:span><text:span text:style-name="T15">HV34/29</text:span></text:p>
          </table:table-cell>
          <table:table-cell office:value-type="string" table:style-name="Cell23">
            <text:p co:para-mark-style-name="T15" text:style-name="P12"><text:span text:style-name="T15">1HV81/10</text:span></text:p>
          </table:table-cell>
          <table:table-cell office:value-type="string" table:style-name="Cell11">
            <text:p co:para-mark-style-name="T16" text:style-name="P14"><text:span text:style-name="T16">Т &gt; 90</text:span></text:p>
          </table:table-cell>
          <table:table-cell office:value-type="string" table:style-name="Cell12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8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06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подшипника двигателя со стороны насоса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15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30</text:span></text:p>
          </table:table-cell>
          <table:table-cell office:value-type="string" table:style-name="Cell20">
            <text:p co:para-mark-style-name="T15" text:style-name="P12"><text:span text:style-name="T15">1HV81/11</text:span></text:p>
          </table:table-cell>
          <table:table-cell office:value-type="string" table:style-name="Cell17">
            <text:p co:para-mark-style-name="T16" text:style-name="P14"><text:span text:style-name="T16">Т &gt; 90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07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обмотки статора фаза U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20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31</text:span></text:p>
          </table:table-cell>
          <table:table-cell office:value-type="string" table:style-name="Cell20">
            <text:p co:para-mark-style-name="T15" text:style-name="P12"><text:span text:style-name="T15">1HV81/24</text:span></text:p>
          </table:table-cell>
          <table:table-cell office:value-type="string" table:style-name="Cell17">
            <text:p co:para-mark-style-name="T16" text:style-name="P14"><text:span text:style-name="T16">Т &gt; 135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08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обмотки статора фаза U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20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32</text:span></text:p>
          </table:table-cell>
          <table:table-cell office:value-type="string" table:style-name="Cell20">
            <text:p co:para-mark-style-name="T15" text:style-name="P12"><text:span text:style-name="T15">1HV81/25</text:span></text:p>
          </table:table-cell>
          <table:table-cell office:value-type="string" table:style-name="Cell17">
            <text:p co:para-mark-style-name="T16" text:style-name="P14"><text:span text:style-name="T16">Т &gt; 135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09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обмотки статора фаза U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20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33</text:span></text:p>
          </table:table-cell>
          <table:table-cell office:value-type="string" table:style-name="Cell20">
            <text:p co:para-mark-style-name="T15" text:style-name="P12"><text:span text:style-name="T15">1HV81/26</text:span></text:p>
          </table:table-cell>
          <table:table-cell office:value-type="string" table:style-name="Cell17">
            <text:p co:para-mark-style-name="T16" text:style-name="P14"><text:span text:style-name="T16">Т &gt; 135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10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обмотки статора фаза V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20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34</text:span></text:p>
          </table:table-cell>
          <table:table-cell office:value-type="string" table:style-name="Cell20">
            <text:p co:para-mark-style-name="T15" text:style-name="P12"><text:span text:style-name="T15">1HV81/30</text:span></text:p>
          </table:table-cell>
          <table:table-cell office:value-type="string" table:style-name="Cell17">
            <text:p co:para-mark-style-name="T16" text:style-name="P14"><text:span text:style-name="T16">Т &gt; 135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11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обмотки статора фаза V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20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35</text:span></text:p>
          </table:table-cell>
          <table:table-cell office:value-type="string" table:style-name="Cell20">
            <text:p co:para-mark-style-name="T15" text:style-name="P12"><text:span text:style-name="T15">1HV81/31</text:span></text:p>
          </table:table-cell>
          <table:table-cell office:value-type="string" table:style-name="Cell17">
            <text:p co:para-mark-style-name="T16" text:style-name="P14"><text:span text:style-name="T16">Т &gt; 135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12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обмотки статора фаза V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200) </text:span><text:span text:style-name="T17">о</text:span><text:span text:style-name="T16">С</text:span></text:p>
          </table:table-cell>
          <table:table-cell office:value-type="string" table:style-name="Cell17">
            <text:p co:para-mark-style-name="T16" text:style-name="P14"><text:span text:style-name="T16">1HV13</text:span></text:p>
          </table:table-cell>
          <table:table-cell office:value-type="string" table:style-name="Cell20">
            <text:p co:para-mark-style-name="T3" text:style-name="P12"><text:span text:style-name="T15">1</text:span><text:span text:style-name="T15">HV34/36</text:span></text:p>
          </table:table-cell>
          <table:table-cell office:value-type="string" table:style-name="Cell20">
            <text:p co:para-mark-style-name="T15" text:style-name="P12"><text:span text:style-name="T15">1HV81/32</text:span></text:p>
          </table:table-cell>
          <table:table-cell office:value-type="string" table:style-name="Cell17">
            <text:p co:para-mark-style-name="T16" text:style-name="P14"><text:span text:style-name="T16">Т &gt; 135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  <table:table-row>
          <table:table-cell office:value-type="string" table:style-name="Cell19">
            <text:p co:para-mark-style-name="T13" text:style-name="P11"><text:span text:style-name="T13">1TG11T13B1</text:span></text:p>
            <text:p co:para-mark-style-name="T13" text:style-name="P11"><text:span text:style-name="T13">1А123/1</text:span></text:p>
          </table:table-cell>
          <table:table-cell office:value-type="string" table:style-name="Cell13">
            <text:p co:para-mark-style-name="T3" text:style-name="P11"><text:span text:style-name="T14">«</text:span><text:span text:style-name="T14">T</text:span><text:span text:style-name="T14">»</text:span><text:span text:style-name="T13"><text:s text:c="1"/>обмотки статора фаза W 1TG11D01</text:span></text:p>
          </table:table-cell>
          <table:table-cell office:value-type="string" table:style-name="Cell13">
            <text:p co:para-mark-style-name="T16" text:style-name="P14"><text:span text:style-name="T16">ТС гр. 50П</text:span></text:p>
            <text:p co:para-mark-style-name="T16" text:style-name="P14"><text:span text:style-name="T16">ИРТ 1730D/A </text:span></text:p>
            <text:p co:para-mark-style-name="T3" text:style-name="P14"><text:span text:style-name="T16">(0-200) </text:span><text:span text:style-name="T17">о</text:span><text:span text:style-name="T16">С</text:span></text:p>
          </table:table-cell>
          <table:table-cell office:value-type="string" table:style-name="Cell20">
            <text:p co:para-mark-style-name="T15" text:style-name="P14"><text:span text:style-name="T15">1HV13</text:span></text:p>
          </table:table-cell>
          <table:table-cell office:value-type="string" table:style-name="Cell24">
            <text:p co:para-mark-style-name="T3" text:style-name="P12"><text:span text:style-name="T24">1</text:span><text:span text:style-name="T24">HV108/2</text:span><text:span text:style-name="T24">3</text:span></text:p>
          </table:table-cell>
          <table:table-cell office:value-type="string" table:style-name="Cell20">
            <text:p co:para-mark-style-name="T15" text:style-name="P12"><text:span text:style-name="T15">1HV82/12</text:span></text:p>
          </table:table-cell>
          <table:table-cell office:value-type="string" table:style-name="Cell17">
            <text:p co:para-mark-style-name="T16" text:style-name="P14"><text:span text:style-name="T16">Т &gt; 135</text:span></text:p>
          </table:table-cell>
          <table:table-cell office:value-type="string" table:style-name="Cell18">
            <text:p co:para-mark-style-name="T20" text:style-name="P12"><text:span text:style-name="T20">TGF01</text:span></text:p>
            <text:p co:para-mark-style-name="T20" text:style-name="P12"><text:span text:style-name="T20">ИВС</text:span></text:p>
          </table:table-cell>
          <table:table-cell office:value-type="string" table:style-name="Cell13">
            <text:p co:para-mark-style-name="T8" text:style-name="P16"/>
          </table:table-cell>
        </table:table-row>
      </table:table>
      <text:p co:para-mark-style-name="T3" text:style-name="P19"/>
      <text:p co:para-mark-style-name="T3" text:style-name="P19"/>
      <text:p co:para-mark-style-name="T6" text:style-name="Standard"><draw:frame draw:style-name="Frm3" svg:height="153.7796pt" svg:width="30.8126pt" svg:x="741.7989pt" svg:y="333.3545pt" text:anchor-type="paragraph"><draw:text-box><text:p text:style-name="P6"><text:span text:style-name="T9"><text:s text:c="1"/></text:span><text:span text:style-name="T9">ТП.1.КИП.ЦТАИ/179 «зам» </text:span></text:p></draw:text-box></draw:frame><text:span text:style-name="T6"><text:s text:c="1"/>Продолжение таблицы Л.1</text:span></text:p>
      <table:table co:columns-count="9" co:grouping-summary-below="true" co:grouping-summary-right="true" co:rows-count="11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column table:style-name="Col9"/>
        <table:table-row>
          <table:table-cell office:value-type="string" table:style-name="Cell2">
            <text:p co:para-mark-style-name="T8" text:style-name="P5"><text:span text:style-name="T8">1</text:span></text:p>
          </table:table-cell>
          <table:table-cell office:value-type="string" table:style-name="Cell2">
            <text:p co:para-mark-style-name="T8" text:style-name="P5"><text:span text:style-name="T8">2</text:span></text:p>
          </table:table-cell>
          <table:table-cell office:value-type="string" table:style-name="Cell2">
            <text:p co:para-mark-style-name="T8" text:style-name="P5"><text:span text:style-name="T8">3</text:span></text:p>
          </table:table-cell>
          <table:table-cell office:value-type="string" table:style-name="Cell2">
            <text:p co:para-mark-style-name="T8" text:style-name="P5"><text:span text:style-name="T8">4</text:span></text:p>
          </table:table-cell>
          <table:table-cell office:value-type="string" table:style-name="Cell21">
            <text:list text:continue-list="list_1" text:style-name="numList_1" xml:id="list_5">
              <text:list-item>
                <text:list>
                  <text:list-item>
                    <text:h co:para-mark-style-name="T12" text:outline-level="2" text:style-name="P9"><text:span text:style-name="T12">5</text:span></text:h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6</text:span></text:p>
          </table:table-cell>
          <table:table-cell office:value-type="string" table:style-name="Cell4">
            <text:list text:continue-list="list_1" text:style-name="numList_1" xml:id="list_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co:para-mark-style-name="T8" text:outline-level="7" text:style-name="P10"><text:span text:style-name="T8">7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8</text:span></text:p>
          </table:table-cell>
          <table:table-cell office:value-type="string" table:style-name="Cell2">
            <text:p co:para-mark-style-name="T8" text:style-name="P5"><text:span text:style-name="T8">9</text:span></text:p>
          </table:table-cell>
        </table:table-row>
        <table:table-row>
          <table:table-cell office:value-type="string" table:style-name="Cell11">
            <text:p co:para-mark-style-name="T25" text:style-name="P11"><text:span text:style-name="T25">1TG11T14B1</text:span></text:p>
            <text:p co:para-mark-style-name="T25" text:style-name="P11"><text:span text:style-name="T25">1А123/1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W 1TG11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V13</text:span></text:p>
          </table:table-cell>
          <table:table-cell office:value-type="string" table:style-name="Cell25">
            <text:p co:para-mark-style-name="T29" text:style-name="P12"><text:span text:style-name="T30">1</text:span><text:span text:style-name="T30">HV108/2</text:span><text:span text:style-name="T30">4</text:span></text:p>
          </table:table-cell>
          <table:table-cell office:value-type="string" table:style-name="Cell23">
            <text:p co:para-mark-style-name="T27" text:style-name="P12"><text:span text:style-name="T27">1HV82/13</text:span></text:p>
          </table:table-cell>
          <table:table-cell office:value-type="string" table:style-name="Cell11">
            <text:p co:para-mark-style-name="T25" text:style-name="P14"><text:span text:style-name="T25">Т &gt; 135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1">
            <text:p co:para-mark-style-name="T25" text:style-name="P11"><text:span text:style-name="T25">1TG11T15B1</text:span></text:p>
            <text:p co:para-mark-style-name="T25" text:style-name="P11"><text:span text:style-name="T25">1А123/1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W 1TG11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V13</text:span></text:p>
          </table:table-cell>
          <table:table-cell office:value-type="string" table:style-name="Cell25">
            <text:p co:para-mark-style-name="T29" text:style-name="P12"><text:span text:style-name="T30">1</text:span><text:span text:style-name="T30">HV108/2</text:span><text:span text:style-name="T30">5</text:span></text:p>
          </table:table-cell>
          <table:table-cell office:value-type="string" table:style-name="Cell23">
            <text:p co:para-mark-style-name="T27" text:style-name="P12"><text:span text:style-name="T27">1HV82/14</text:span></text:p>
          </table:table-cell>
          <table:table-cell office:value-type="string" table:style-name="Cell11">
            <text:p co:para-mark-style-name="T25" text:style-name="P14"><text:span text:style-name="T25">Т &gt; 135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1">
            <text:p co:para-mark-style-name="T25" text:style-name="P11"><text:span text:style-name="T25">1TG11T16B1</text:span></text:p>
            <text:p co:para-mark-style-name="T25" text:style-name="P11"><text:span text:style-name="T25">1А123/1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двигателя 1TG11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V13</text:span></text:p>
          </table:table-cell>
          <table:table-cell office:value-type="string" table:style-name="Cell25">
            <text:p co:para-mark-style-name="T29" text:style-name="P12"><text:span text:style-name="T30">1</text:span><text:span text:style-name="T30">HV108/2</text:span><text:span text:style-name="T30">6</text:span></text:p>
          </table:table-cell>
          <table:table-cell office:value-type="string" table:style-name="Cell23">
            <text:p co:para-mark-style-name="T27" text:style-name="P12"><text:span text:style-name="T27">1HV82/24</text:span></text:p>
          </table:table-cell>
          <table:table-cell office:value-type="string" table:style-name="Cell11">
            <text:p co:para-mark-style-name="T25" text:style-name="P14"><text:span text:style-name="T25">Т &gt; 90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1T17B1</text:span></text:p>
            <text:p co:para-mark-style-name="T25" text:style-name="P11"><text:span text:style-name="T25">1А123/1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двигателя 1TG11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V13</text:span></text:p>
          </table:table-cell>
          <table:table-cell office:value-type="string" table:style-name="Cell24">
            <text:p co:para-mark-style-name="T29" text:style-name="P12"><text:span text:style-name="T30">1</text:span><text:span text:style-name="T30">HV108/2</text:span><text:span text:style-name="T30">7</text:span></text:p>
          </table:table-cell>
          <table:table-cell office:value-type="string" table:style-name="Cell20">
            <text:p co:para-mark-style-name="T27" text:style-name="P12"><text:span text:style-name="T27">1HV82/25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1T18B1</text:span></text:p>
            <text:p co:para-mark-style-name="T25" text:style-name="P11"><text:span text:style-name="T25">1А123/1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двигателя 1TG11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V13</text:span></text:p>
          </table:table-cell>
          <table:table-cell office:value-type="string" table:style-name="Cell24">
            <text:p co:para-mark-style-name="T29" text:style-name="P12"><text:span text:style-name="T30">1</text:span><text:span text:style-name="T30">HV108/</text:span><text:span text:style-name="T30">28</text:span></text:p>
          </table:table-cell>
          <table:table-cell office:value-type="string" table:style-name="Cell20">
            <text:p co:para-mark-style-name="T27" text:style-name="P12"><text:span text:style-name="T27">1HV82/26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1T19B1</text:span></text:p>
            <text:p co:para-mark-style-name="T25" text:style-name="P11"><text:span text:style-name="T25">1А123/1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напорного патрубка 1TG11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V13</text:span></text:p>
          </table:table-cell>
          <table:table-cell office:value-type="string" table:style-name="Cell24">
            <text:p co:para-mark-style-name="T29" text:style-name="P12"><text:span text:style-name="T30">1</text:span><text:span text:style-name="T30">HV108/</text:span><text:span text:style-name="T30">29</text:span></text:p>
          </table:table-cell>
          <table:table-cell office:value-type="string" table:style-name="Cell20">
            <text:p co:para-mark-style-name="T27" text:style-name="P12"><text:span text:style-name="T27">1HV82/30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1T20B1</text:span></text:p>
            <text:p co:para-mark-style-name="T25" text:style-name="P11"><text:span text:style-name="T25">1А123/1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напорного патрубка 1TG11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V13</text:span></text:p>
          </table:table-cell>
          <table:table-cell office:value-type="string" table:style-name="Cell24">
            <text:p co:para-mark-style-name="T29" text:style-name="P12"><text:span text:style-name="T30">1</text:span><text:span text:style-name="T30">HV108/3</text:span><text:span text:style-name="T30">0</text:span></text:p>
          </table:table-cell>
          <table:table-cell office:value-type="string" table:style-name="Cell20">
            <text:p co:para-mark-style-name="T27" text:style-name="P12"><text:span text:style-name="T27">1HV82/31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1T21B1</text:span></text:p>
            <text:p co:para-mark-style-name="T25" text:style-name="P11"><text:span text:style-name="T25">1А123/1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напорного патрубка 1TG11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V13</text:span></text:p>
          </table:table-cell>
          <table:table-cell office:value-type="string" table:style-name="Cell24">
            <text:p co:para-mark-style-name="T29" text:style-name="P12"><text:span text:style-name="T30">1</text:span><text:span text:style-name="T30">HV108/3</text:span><text:span text:style-name="T30">1</text:span></text:p>
          </table:table-cell>
          <table:table-cell office:value-type="string" table:style-name="Cell20">
            <text:p co:para-mark-style-name="T27" text:style-name="P12"><text:span text:style-name="T27">1HV82/32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01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двигателя со стороны свобод. конца вала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25</text:span></text:p>
          </table:table-cell>
          <table:table-cell office:value-type="string" table:style-name="Cell20">
            <text:p co:para-mark-style-name="T27" text:style-name="P12"><text:span text:style-name="T27">1HX81/15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02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двигателя со стороны свобод. конца вала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26</text:span></text:p>
          </table:table-cell>
          <table:table-cell office:value-type="string" table:style-name="Cell20">
            <text:p co:para-mark-style-name="T27" text:style-name="P12"><text:span text:style-name="T27">1HX81/16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</table:table>
      <text:p co:para-mark-style-name="T3" text:style-name="P19"/>
      <text:p co:para-mark-style-name="T3" text:style-name="P19"/>
      <text:p co:para-mark-style-name="T6" text:style-name="P18"><text:span text:style-name="T23">Продолжение таблицы </text:span><text:span text:style-name="T23">Л</text:span><text:span text:style-name="T23">.</text:span><text:span text:style-name="T23">1</text:span></text:p>
      <table:table co:columns-count="9" co:grouping-summary-below="true" co:grouping-summary-right="true" co:rows-count="12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column table:style-name="Col9"/>
        <table:table-row>
          <table:table-cell office:value-type="string" table:style-name="Cell2">
            <text:p co:para-mark-style-name="T8" text:style-name="P5"><text:span text:style-name="T8">1</text:span></text:p>
          </table:table-cell>
          <table:table-cell office:value-type="string" table:style-name="Cell2">
            <text:p co:para-mark-style-name="T8" text:style-name="P5"><text:span text:style-name="T8">2</text:span></text:p>
          </table:table-cell>
          <table:table-cell office:value-type="string" table:style-name="Cell2">
            <text:p co:para-mark-style-name="T8" text:style-name="P5"><text:span text:style-name="T8">3</text:span></text:p>
          </table:table-cell>
          <table:table-cell office:value-type="string" table:style-name="Cell2">
            <text:p co:para-mark-style-name="T8" text:style-name="P5"><text:span text:style-name="T8">4</text:span></text:p>
          </table:table-cell>
          <table:table-cell office:value-type="string" table:style-name="Cell21">
            <text:list text:continue-list="list_1" text:style-name="numList_1" xml:id="list_7">
              <text:list-item>
                <text:list>
                  <text:list-item>
                    <text:h co:para-mark-style-name="T12" text:outline-level="2" text:style-name="P9"><text:span text:style-name="T12">5</text:span></text:h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6</text:span></text:p>
          </table:table-cell>
          <table:table-cell office:value-type="string" table:style-name="Cell4">
            <text:list text:continue-list="list_1" text:style-name="numList_1" xml:id="list_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co:para-mark-style-name="T8" text:outline-level="7" text:style-name="P10"><text:span text:style-name="T8">7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8</text:span></text:p>
          </table:table-cell>
          <table:table-cell office:value-type="string" table:style-name="Cell2">
            <text:p co:para-mark-style-name="T8" text:style-name="P5"><text:span text:style-name="T8">9</text:span></text:p>
          </table:table-cell>
        </table:table-row>
        <table:table-row>
          <table:table-cell office:value-type="string" table:style-name="Cell11">
            <text:p co:para-mark-style-name="T25" text:style-name="P11"><text:span text:style-name="T25">1TG13T03B1</text:span></text:p>
            <text:p co:para-mark-style-name="T25" text:style-name="P11"><text:span text:style-name="T25">1А123/3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двигателя со стороны свобод. конца вала 1TG13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X13</text:span></text:p>
          </table:table-cell>
          <table:table-cell office:value-type="string" table:style-name="Cell23">
            <text:p co:para-mark-style-name="T26" text:style-name="P12"><text:span text:style-name="T27">1</text:span><text:span text:style-name="T27">HX34/27</text:span></text:p>
          </table:table-cell>
          <table:table-cell office:value-type="string" table:style-name="Cell23">
            <text:p co:para-mark-style-name="T27" text:style-name="P12"><text:span text:style-name="T27">1HX81/20</text:span></text:p>
          </table:table-cell>
          <table:table-cell office:value-type="string" table:style-name="Cell11">
            <text:p co:para-mark-style-name="T25" text:style-name="P14"><text:span text:style-name="T25">Т &gt; 90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1">
            <text:p co:para-mark-style-name="T25" text:style-name="P11"><text:span text:style-name="T25">1TG13T04B1</text:span></text:p>
            <text:p co:para-mark-style-name="T25" text:style-name="P11"><text:span text:style-name="T25">1А123/3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двигателя со стороны насоса 1TG13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X13</text:span></text:p>
          </table:table-cell>
          <table:table-cell office:value-type="string" table:style-name="Cell23">
            <text:p co:para-mark-style-name="T26" text:style-name="P12"><text:span text:style-name="T27">1</text:span><text:span text:style-name="T27">HX34/28</text:span></text:p>
          </table:table-cell>
          <table:table-cell office:value-type="string" table:style-name="Cell23">
            <text:p co:para-mark-style-name="T27" text:style-name="P12"><text:span text:style-name="T27">1HX81/9</text:span></text:p>
          </table:table-cell>
          <table:table-cell office:value-type="string" table:style-name="Cell11">
            <text:p co:para-mark-style-name="T25" text:style-name="P14"><text:span text:style-name="T25">Т &gt; 90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1">
            <text:p co:para-mark-style-name="T25" text:style-name="P11"><text:span text:style-name="T25">1TG13T05B1</text:span></text:p>
            <text:p co:para-mark-style-name="T25" text:style-name="P11"><text:span text:style-name="T25">1А123/3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двигателя со стороны насоса 1TG13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X13</text:span></text:p>
          </table:table-cell>
          <table:table-cell office:value-type="string" table:style-name="Cell23">
            <text:p co:para-mark-style-name="T26" text:style-name="P12"><text:span text:style-name="T27">1</text:span><text:span text:style-name="T27">HX34/29</text:span></text:p>
          </table:table-cell>
          <table:table-cell office:value-type="string" table:style-name="Cell23">
            <text:p co:para-mark-style-name="T27" text:style-name="P12"><text:span text:style-name="T27">1HX81/10</text:span></text:p>
          </table:table-cell>
          <table:table-cell office:value-type="string" table:style-name="Cell11">
            <text:p co:para-mark-style-name="T25" text:style-name="P14"><text:span text:style-name="T25">Т &gt; 90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06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двигателя со стороны насоса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30</text:span></text:p>
          </table:table-cell>
          <table:table-cell office:value-type="string" table:style-name="Cell20">
            <text:p co:para-mark-style-name="T27" text:style-name="P12"><text:span text:style-name="T27">1HX81/11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07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U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31</text:span></text:p>
          </table:table-cell>
          <table:table-cell office:value-type="string" table:style-name="Cell20">
            <text:p co:para-mark-style-name="T27" text:style-name="P12"><text:span text:style-name="T27">1HX81/24</text:span></text:p>
          </table:table-cell>
          <table:table-cell office:value-type="string" table:style-name="Cell17">
            <text:p co:para-mark-style-name="T25" text:style-name="P14"><text:span text:style-name="T25">Т &gt; 135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08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U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32</text:span></text:p>
          </table:table-cell>
          <table:table-cell office:value-type="string" table:style-name="Cell20">
            <text:p co:para-mark-style-name="T27" text:style-name="P12"><text:span text:style-name="T27">1HX81/25</text:span></text:p>
          </table:table-cell>
          <table:table-cell office:value-type="string" table:style-name="Cell17">
            <text:p co:para-mark-style-name="T25" text:style-name="P14"><text:span text:style-name="T25">Т &gt; 135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09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U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33</text:span></text:p>
          </table:table-cell>
          <table:table-cell office:value-type="string" table:style-name="Cell20">
            <text:p co:para-mark-style-name="T27" text:style-name="P12"><text:span text:style-name="T27">1HX81/26</text:span></text:p>
          </table:table-cell>
          <table:table-cell office:value-type="string" table:style-name="Cell17">
            <text:p co:para-mark-style-name="T25" text:style-name="P14"><text:span text:style-name="T25">Т &gt; 135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10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V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34</text:span></text:p>
          </table:table-cell>
          <table:table-cell office:value-type="string" table:style-name="Cell20">
            <text:p co:para-mark-style-name="T27" text:style-name="P12"><text:span text:style-name="T27">1HX81/30</text:span></text:p>
          </table:table-cell>
          <table:table-cell office:value-type="string" table:style-name="Cell17">
            <text:p co:para-mark-style-name="T25" text:style-name="P14"><text:span text:style-name="T25">Т &gt; 135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11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V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35</text:span></text:p>
          </table:table-cell>
          <table:table-cell office:value-type="string" table:style-name="Cell20">
            <text:p co:para-mark-style-name="T27" text:style-name="P12"><text:span text:style-name="T27">1HX81/31</text:span></text:p>
          </table:table-cell>
          <table:table-cell office:value-type="string" table:style-name="Cell17">
            <text:p co:para-mark-style-name="T25" text:style-name="P14"><text:span text:style-name="T25">Т &gt; 135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12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V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34/36</text:span></text:p>
          </table:table-cell>
          <table:table-cell office:value-type="string" table:style-name="Cell20">
            <text:p co:para-mark-style-name="T27" text:style-name="P12"><text:span text:style-name="T27">1HX81/32</text:span></text:p>
          </table:table-cell>
          <table:table-cell office:value-type="string" table:style-name="Cell17">
            <text:p co:para-mark-style-name="T25" text:style-name="P14"><text:span text:style-name="T25">Т &gt; 135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13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W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108/37</text:span></text:p>
          </table:table-cell>
          <table:table-cell office:value-type="string" table:style-name="Cell20">
            <text:p co:para-mark-style-name="T27" text:style-name="P12"><text:span text:style-name="T27">1HX82/12</text:span></text:p>
          </table:table-cell>
          <table:table-cell office:value-type="string" table:style-name="Cell17">
            <text:p co:para-mark-style-name="T25" text:style-name="P14"><text:span text:style-name="T25">Т &gt; 135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</table:table>
      <text:p co:para-mark-style-name="T31" text:style-name="P21"/>
      <text:p co:para-mark-style-name="T31" text:style-name="P21"/>
      <text:p co:para-mark-style-name="T23" text:style-name="P18"><text:span text:style-name="T23">Продолжение таблицы </text:span><text:span text:style-name="T23">Л</text:span><text:span text:style-name="T23">.</text:span><text:span text:style-name="T23">1</text:span></text:p>
      <table:table co:columns-count="9" co:grouping-summary-below="true" co:grouping-summary-right="true" co:rows-count="13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column table:style-name="Col9"/>
        <table:table-row>
          <table:table-cell office:value-type="string" table:style-name="Cell2">
            <text:p co:para-mark-style-name="T8" text:style-name="P5"><text:span text:style-name="T8">1</text:span></text:p>
          </table:table-cell>
          <table:table-cell office:value-type="string" table:style-name="Cell2">
            <text:p co:para-mark-style-name="T8" text:style-name="P5"><text:span text:style-name="T8">2</text:span></text:p>
          </table:table-cell>
          <table:table-cell office:value-type="string" table:style-name="Cell2">
            <text:p co:para-mark-style-name="T8" text:style-name="P5"><text:span text:style-name="T8">3</text:span></text:p>
          </table:table-cell>
          <table:table-cell office:value-type="string" table:style-name="Cell2">
            <text:p co:para-mark-style-name="T8" text:style-name="P5"><text:span text:style-name="T8">4</text:span></text:p>
          </table:table-cell>
          <table:table-cell office:value-type="string" table:style-name="Cell21">
            <text:list text:continue-list="list_1" text:style-name="numList_1" xml:id="list_9">
              <text:list-item>
                <text:list>
                  <text:list-item>
                    <text:h co:para-mark-style-name="T12" text:outline-level="2" text:style-name="P9"><text:span text:style-name="T12">5</text:span></text:h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6</text:span></text:p>
          </table:table-cell>
          <table:table-cell office:value-type="string" table:style-name="Cell4">
            <text:list text:continue-list="list_1" text:style-name="numList_1" xml:id="list_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co:para-mark-style-name="T8" text:outline-level="7" text:style-name="P10"><text:span text:style-name="T8">7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 table:style-name="Cell2">
            <text:p co:para-mark-style-name="T8" text:style-name="P5"><text:span text:style-name="T8">8</text:span></text:p>
          </table:table-cell>
          <table:table-cell office:value-type="string" table:style-name="Cell2">
            <text:p co:para-mark-style-name="T8" text:style-name="P5"><text:span text:style-name="T8">9</text:span></text:p>
          </table:table-cell>
        </table:table-row>
        <table:table-row>
          <table:table-cell office:value-type="string" table:style-name="Cell11">
            <text:p co:para-mark-style-name="T25" text:style-name="P11"><text:span text:style-name="T25">1TG13T14B1</text:span></text:p>
            <text:p co:para-mark-style-name="T25" text:style-name="P11"><text:span text:style-name="T25">1А123/3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W 1TG13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X13</text:span></text:p>
          </table:table-cell>
          <table:table-cell office:value-type="string" table:style-name="Cell23">
            <text:p co:para-mark-style-name="T26" text:style-name="P12"><text:span text:style-name="T27">1</text:span><text:span text:style-name="T27">HX108/38</text:span></text:p>
          </table:table-cell>
          <table:table-cell office:value-type="string" table:style-name="Cell23">
            <text:p co:para-mark-style-name="T27" text:style-name="P12"><text:span text:style-name="T27">1HX82/13</text:span></text:p>
          </table:table-cell>
          <table:table-cell office:value-type="string" table:style-name="Cell11">
            <text:p co:para-mark-style-name="T25" text:style-name="P14"><text:span text:style-name="T25">Т &gt; 135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1">
            <text:p co:para-mark-style-name="T25" text:style-name="P11"><text:span text:style-name="T25">1TG13T15B1</text:span></text:p>
            <text:p co:para-mark-style-name="T25" text:style-name="P11"><text:span text:style-name="T25">1А123/3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обмотки статора фаза W 1TG13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20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X13</text:span></text:p>
          </table:table-cell>
          <table:table-cell office:value-type="string" table:style-name="Cell23">
            <text:p co:para-mark-style-name="T26" text:style-name="P12"><text:span text:style-name="T27">1</text:span><text:span text:style-name="T27">HX108/39</text:span></text:p>
          </table:table-cell>
          <table:table-cell office:value-type="string" table:style-name="Cell23">
            <text:p co:para-mark-style-name="T27" text:style-name="P12"><text:span text:style-name="T27">1HX82/14</text:span></text:p>
          </table:table-cell>
          <table:table-cell office:value-type="string" table:style-name="Cell11">
            <text:p co:para-mark-style-name="T25" text:style-name="P14"><text:span text:style-name="T25">Т &gt; 135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1">
            <text:p co:para-mark-style-name="T25" text:style-name="P11"><text:span text:style-name="T25">1TG13T16B1</text:span></text:p>
            <text:p co:para-mark-style-name="T25" text:style-name="P11"><text:span text:style-name="T25">1А123/3</text:span></text:p>
          </table:table-cell>
          <table:table-cell office:value-type="string" table:style-name="Cell8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двигателя 1TG13D01</text:span></text:p>
          </table:table-cell>
          <table:table-cell office:value-type="string" table:style-name="Cell8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1">
            <text:p co:para-mark-style-name="T25" text:style-name="P14"><text:span text:style-name="T25">1HX13</text:span></text:p>
          </table:table-cell>
          <table:table-cell office:value-type="string" table:style-name="Cell23">
            <text:p co:para-mark-style-name="T26" text:style-name="P12"><text:span text:style-name="T27">1</text:span><text:span text:style-name="T27">HX108/40</text:span></text:p>
          </table:table-cell>
          <table:table-cell office:value-type="string" table:style-name="Cell23">
            <text:p co:para-mark-style-name="T27" text:style-name="P12"><text:span text:style-name="T27">1HX82/24</text:span></text:p>
          </table:table-cell>
          <table:table-cell office:value-type="string" table:style-name="Cell11">
            <text:p co:para-mark-style-name="T25" text:style-name="P14"><text:span text:style-name="T25">Т &gt; 90</text:span></text:p>
          </table:table-cell>
          <table:table-cell office:value-type="string" table:style-name="Cell23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8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17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двигателя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108/41</text:span></text:p>
          </table:table-cell>
          <table:table-cell office:value-type="string" table:style-name="Cell20">
            <text:p co:para-mark-style-name="T27" text:style-name="P12"><text:span text:style-name="T27">1HX82/25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18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двигателя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108/42</text:span></text:p>
          </table:table-cell>
          <table:table-cell office:value-type="string" table:style-name="Cell20">
            <text:p co:para-mark-style-name="T27" text:style-name="P12"><text:span text:style-name="T27">1HX82/26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19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напорного патрубка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108/43</text:span></text:p>
          </table:table-cell>
          <table:table-cell office:value-type="string" table:style-name="Cell20">
            <text:p co:para-mark-style-name="T27" text:style-name="P12"><text:span text:style-name="T27">1HX82/30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20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напорного патрубка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108/44</text:span></text:p>
          </table:table-cell>
          <table:table-cell office:value-type="string" table:style-name="Cell20">
            <text:p co:para-mark-style-name="T27" text:style-name="P12"><text:span text:style-name="T27">1HX82/31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5" text:style-name="P11"><text:span text:style-name="T25">1TG13T21B1</text:span></text:p>
            <text:p co:para-mark-style-name="T25" text:style-name="P11"><text:span text:style-name="T25">1А123/3</text:span></text:p>
          </table:table-cell>
          <table:table-cell office:value-type="string" table:style-name="Cell13">
            <text:p co:para-mark-style-name="T26" text:style-name="P11"><text:span text:style-name="T27">«</text:span><text:span text:style-name="T27">T</text:span><text:span text:style-name="T27">»</text:span><text:span text:style-name="T25"><text:s text:c="1"/>подшипника насоса со стороны напорного патрубка 1TG13D01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5" text:style-name="P14"><text:span text:style-name="T25">ИРТ 1730D/A </text:span></text:p>
            <text:p co:para-mark-style-name="T26" text:style-name="P14"><text:span text:style-name="T25">(0-150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1HX13</text:span></text:p>
          </table:table-cell>
          <table:table-cell office:value-type="string" table:style-name="Cell20">
            <text:p co:para-mark-style-name="T26" text:style-name="P12"><text:span text:style-name="T27">1</text:span><text:span text:style-name="T27">HX108/45</text:span></text:p>
          </table:table-cell>
          <table:table-cell office:value-type="string" table:style-name="Cell20">
            <text:p co:para-mark-style-name="T27" text:style-name="P12"><text:span text:style-name="T27">1HX82/32</text:span></text:p>
          </table:table-cell>
          <table:table-cell office:value-type="string" table:style-name="Cell17">
            <text:p co:para-mark-style-name="T25" text:style-name="P14"><text:span text:style-name="T25">Т &gt; 90</text:span></text:p>
          </table:table-cell>
          <table:table-cell office:value-type="string" table:style-name="Cell20">
            <text:p co:para-mark-style-name="T27" text:style-name="P12"><text:span text:style-name="T27">TGF01</text:span></text:p>
            <text:p co:para-mark-style-name="T27" text:style-name="P12"><text:span text:style-name="T27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6" text:style-name="P22"><text:span text:style-name="T25">1</text:span><text:span text:style-name="T25">TG</text:span><text:span text:style-name="T25">21</text:span><text:span text:style-name="T25">T</text:span><text:span text:style-name="T25">01</text:span><text:span text:style-name="T25">B</text:span><text:span text:style-name="T25">1</text:span></text:p>
            <text:p co:para-mark-style-name="T25" text:style-name="P22"><text:span text:style-name="T25">1ГА701</text:span></text:p>
          </table:table-cell>
          <table:table-cell office:value-type="string" table:style-name="Cell17">
            <text:p co:para-mark-style-name="T26" text:style-name="P14"><text:span text:style-name="T25">«</text:span><text:span text:style-name="T25">T</text:span><text:span text:style-name="T25">» воды в отсеке 1</text:span><text:span text:style-name="T25">TG</text:span><text:span text:style-name="T25">21</text:span><text:span text:style-name="T25">B</text:span><text:span text:style-name="T25">01 БВ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6" text:style-name="P14"><text:span text:style-name="T25">(0-150)</text:span><text:span text:style-name="T25"><text:s text:c="1"/>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6" text:style-name="P22"><text:span text:style-name="T25">1</text:span><text:span text:style-name="T25">TG</text:span><text:span text:style-name="T25">21</text:span><text:span text:style-name="T25">T</text:span><text:span text:style-name="T25">02</text:span><text:span text:style-name="T25">B</text:span><text:span text:style-name="T25">1</text:span></text:p>
            <text:p co:para-mark-style-name="T25" text:style-name="P22"><text:span text:style-name="T25">1ГА701</text:span></text:p>
          </table:table-cell>
          <table:table-cell office:value-type="string" table:style-name="Cell17">
            <text:p co:para-mark-style-name="T26" text:style-name="P14"><text:span text:style-name="T25">«</text:span><text:span text:style-name="T25">T</text:span><text:span text:style-name="T25">» воды в отсеке 1</text:span><text:span text:style-name="T25">TG</text:span><text:span text:style-name="T25">21</text:span><text:span text:style-name="T25">B</text:span><text:span text:style-name="T25">02 БВ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6" text:style-name="P14"><text:span text:style-name="T25">(</text:span><text:span text:style-name="T25">0-150</text:span><text:span text:style-name="T25">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6" text:style-name="P22"><text:span text:style-name="T25">1</text:span><text:span text:style-name="T25">TG</text:span><text:span text:style-name="T25">21</text:span><text:span text:style-name="T25">T</text:span><text:span text:style-name="T25">03</text:span><text:span text:style-name="T25">B</text:span><text:span text:style-name="T25">1</text:span></text:p>
            <text:p co:para-mark-style-name="T25" text:style-name="P22"><text:span text:style-name="T25">1ГА701</text:span></text:p>
          </table:table-cell>
          <table:table-cell office:value-type="string" table:style-name="Cell17">
            <text:p co:para-mark-style-name="T26" text:style-name="P14"><text:span text:style-name="T25">«</text:span><text:span text:style-name="T25">T</text:span><text:span text:style-name="T25">» воды в отсеке 1</text:span><text:span text:style-name="T25">TG</text:span><text:span text:style-name="T25">21</text:span><text:span text:style-name="T25">B</text:span><text:span text:style-name="T25">03 БВ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6" text:style-name="P14"><text:span text:style-name="T25">(</text:span><text:span text:style-name="T25">0-150</text:span><text:span text:style-name="T25">) 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ИВС</text:span></text:p>
          </table:table-cell>
          <table:table-cell office:value-type="string" table:style-name="Cell13">
            <text:p co:para-mark-style-name="T25" text:style-name="P20"/>
          </table:table-cell>
        </table:table-row>
        <table:table-row>
          <table:table-cell office:value-type="string" table:style-name="Cell17">
            <text:p co:para-mark-style-name="T26" text:style-name="P22"><text:span text:style-name="T25">1</text:span><text:span text:style-name="T25">TG</text:span><text:span text:style-name="T25">21</text:span><text:span text:style-name="T25">T</text:span><text:span text:style-name="T25">04</text:span><text:span text:style-name="T25">B</text:span><text:span text:style-name="T25">1</text:span></text:p>
            <text:p co:para-mark-style-name="T25" text:style-name="P22"><text:span text:style-name="T25">1ГА701</text:span></text:p>
          </table:table-cell>
          <table:table-cell office:value-type="string" table:style-name="Cell17">
            <text:p co:para-mark-style-name="T26" text:style-name="P14"><text:span text:style-name="T25">«</text:span><text:span text:style-name="T25">T</text:span><text:span text:style-name="T25">» воды в отсеке 1</text:span><text:span text:style-name="T25">TG</text:span><text:span text:style-name="T25">21</text:span><text:span text:style-name="T25">B</text:span><text:span text:style-name="T25">04 БВ</text:span></text:p>
          </table:table-cell>
          <table:table-cell office:value-type="string" table:style-name="Cell13">
            <text:p co:para-mark-style-name="T25" text:style-name="P14"><text:span text:style-name="T25">ТС гр. 50П</text:span></text:p>
            <text:p co:para-mark-style-name="T26" text:style-name="P14"><text:span text:style-name="T25">(0-150)</text:span><text:span text:style-name="T25"><text:s text:c="1"/></text:span><text:span text:style-name="T28">о</text:span><text:span text:style-name="T25">С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─</text:span></text:p>
          </table:table-cell>
          <table:table-cell office:value-type="string" table:style-name="Cell17">
            <text:p co:para-mark-style-name="T25" text:style-name="P14"><text:span text:style-name="T25">ИВС</text:span></text:p>
          </table:table-cell>
          <table:table-cell office:value-type="string" table:style-name="Cell13">
            <text:p co:para-mark-style-name="T25" text:style-name="P20"/>
          </table:table-cell>
        </table:table-row>
      </table:table>
      <text:p co:para-mark-style-name="T31" text:style-name="P21"/>
      <text:p co:para-mark-style-name="T31" text:style-name="P21"/>
      <text:p co:para-mark-style-name="T23" text:style-name="P18"><text:span text:style-name="T23">Продолжение таблицы </text:span><text:span text:style-name="T23">Л</text:span><text:span text:style-name="T23">.</text:span><text:span text:style-name="T23">1</text:span></text:p>
      <table:table co:columns-count="9" co:grouping-summary-below="true" co:grouping-summary-right="true" co:rows-count="11" co:show-zero-value="true" table:style-name="Table2" table:use-banding-columns-styles="false" table:use-banding-rows-styles="false" table:use-first-column-styles="false" table:use-first-row-styles="false" table:use-last-column-styles="false" table:use-last-row-styles="false">
        <table:table-column table:style-name="Col10"/>
        <table:table-column table:style-name="Col11"/>
        <table:table-column table:style-name="Col12"/>
        <table:table-column table:style-name="Col13"/>
        <table:table-column table:style-name="Col14"/>
        <table:table-column table:style-name="Col15"/>
        <table:table-column table:style-name="Col16"/>
        <table:table-column table:style-name="Col17"/>
        <table:table-column table:style-name="Col18"/>
        <table:table-row>
          <table:table-cell office:value-type="string" table:style-name="Cell2">
            <text:p co:para-mark-style-name="T32" text:style-name="P14"><text:span text:style-name="T32">1</text:span></text:p>
          </table:table-cell>
          <table:table-cell office:value-type="string" table:style-name="Cell2">
            <text:p co:para-mark-style-name="T32" text:style-name="P14"><text:span text:style-name="T32">2</text:span></text:p>
          </table:table-cell>
          <table:table-cell office:value-type="string" table:style-name="Cell2">
            <text:p co:para-mark-style-name="T32" text:style-name="P14"><text:span text:style-name="T32">3</text:span></text:p>
          </table:table-cell>
          <table:table-cell office:value-type="string" table:style-name="Cell2">
            <text:p co:para-mark-style-name="T32" text:style-name="P14"><text:span text:style-name="T32">4</text:span></text:p>
          </table:table-cell>
          <table:table-cell office:value-type="string" table:style-name="Cell21">
            <text:h co:para-mark-style-name="T33" text:outline-level="2" text:style-name="P15"><text:span text:style-name="T33">5</text:span></text:h>
          </table:table-cell>
          <table:table-cell office:value-type="string" table:style-name="Cell2">
            <text:p co:para-mark-style-name="T32" text:style-name="P14"><text:span text:style-name="T32">6</text:span></text:p>
          </table:table-cell>
          <table:table-cell office:value-type="string" table:style-name="Cell2">
            <text:p co:para-mark-style-name="T32" text:style-name="P14"><text:span text:style-name="T32">7</text:span></text:p>
          </table:table-cell>
          <table:table-cell office:value-type="string" table:style-name="Cell2">
            <text:p co:para-mark-style-name="T32" text:style-name="P14"><text:span text:style-name="T32">8</text:span></text:p>
          </table:table-cell>
          <table:table-cell office:value-type="string" table:style-name="Cell2">
            <text:p co:para-mark-style-name="T32" text:style-name="P14"><text:span text:style-name="T32">9</text:span></text:p>
          </table:table-cell>
        </table:table-row>
        <table:table-row>
          <table:table-cell office:value-type="string" table:style-name="Cell2">
            <text:p co:para-mark-style-name="T32" text:style-name="P23"><text:span text:style-name="T32">1TG22T31B1</text:span></text:p>
            <text:p co:para-mark-style-name="T32" text:style-name="P23"><text:span text:style-name="T32">1ГА401/2</text:span></text:p>
          </table:table-cell>
          <table:table-cell office:value-type="string" table:style-name="Cell2">
            <text:p co:para-mark-style-name="T3" text:style-name="P23"><text:span text:style-name="T32">«</text:span><text:span text:style-name="T32">T</text:span><text:span text:style-name="T32">» воды в отсеке 1TG21B01 БВ </text:span></text:p>
          </table:table-cell>
          <table:table-cell office:value-type="string" table:style-name="Cell2">
            <text:p co:para-mark-style-name="T3" text:style-name="P23"><text:span text:style-name="T32">ТС-1388А, </text:span><text:span text:style-name="T32">Pt</text:span><text:span text:style-name="T32">100</text:span></text:p>
            <text:p co:para-mark-style-name="T3" text:style-name="P23"><text:span text:style-name="T32">(</text:span><text:span text:style-name="T32">-50-200</text:span><text:span text:style-name="T32">)</text:span><text:span text:style-name="T32"><text:s text:c="1"/>°С</text:span></text:p>
          </table:table-cell>
          <table:table-cell office:value-type="string" table:style-name="Cell2">
            <text:p co:para-mark-style-name="T3" text:style-name="P14"><text:span text:style-name="T32">1</text:span><text:span text:style-name="T32">HY</text:span><text:span text:style-name="T32">05</text:span></text:p>
            <text:p co:para-mark-style-name="T32" text:style-name="P14"><text:span text:style-name="T32">(СК 1TG22XK01 пом. 1ГА401/2)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" text:style-name="P14"><text:span text:style-name="T32">ВП пан. 1</text:span><text:span text:style-name="T32">HY</text:span><text:span text:style-name="T32">05 поз. 1</text:span><text:span text:style-name="T32">HY</text:span><text:span text:style-name="T32">05</text:span><text:span text:style-name="T32">P</text:span><text:span text:style-name="T32">01 (РМТ-59А) </text:span></text:p>
          </table:table-cell>
          <table:table-cell office:value-type="string" table:style-name="Cell2">
            <text:p co:para-mark-style-name="T32" text:style-name="P23"><text:span text:style-name="T32">ИК АКИП</text:span></text:p>
            <text:p co:para-mark-style-name="T32" text:style-name="P23"><text:span text:style-name="T32">ГП: ВЭГ-08</text:span></text:p>
            <text:p co:para-mark-style-name="T3" text:style-name="P23"><text:span text:style-name="T32">PEG-168 Мод </text:span><text:span text:style-name="T32">D</text:span></text:p>
          </table:table-cell>
        </table:table-row>
        <table:table-row table:style-name="Row1">
          <table:table-cell office:value-type="string" table:style-name="Cell2">
            <text:p co:para-mark-style-name="T32" text:style-name="P23"><text:span text:style-name="T32">1TG23T31B1</text:span></text:p>
            <text:p co:para-mark-style-name="T32" text:style-name="P23"><text:span text:style-name="T32">1ГА401/2</text:span></text:p>
          </table:table-cell>
          <table:table-cell office:value-type="string" table:style-name="Cell2">
            <text:p co:para-mark-style-name="T3" text:style-name="P23"><text:span text:style-name="T32">«</text:span><text:span text:style-name="T32">T</text:span><text:span text:style-name="T32">» воды в отсеке 1TG21B01 БВ</text:span></text:p>
          </table:table-cell>
          <table:table-cell office:value-type="string" table:style-name="Cell2">
            <text:p co:para-mark-style-name="T3" text:style-name="P23"><text:span text:style-name="T32">ТС-1388А, </text:span><text:span text:style-name="T32">Pt</text:span><text:span text:style-name="T32">100</text:span></text:p>
            <text:p co:para-mark-style-name="T3" text:style-name="P23"><text:span text:style-name="T32">(</text:span><text:span text:style-name="T32">-50-200</text:span><text:span text:style-name="T32">)</text:span><text:span text:style-name="T32"><text:s text:c="1"/>°С</text:span></text:p>
          </table:table-cell>
          <table:table-cell office:value-type="string" table:style-name="Cell2">
            <text:p co:para-mark-style-name="T3" text:style-name="P14"><text:span text:style-name="T32">1</text:span><text:span text:style-name="T32">HR</text:span><text:span text:style-name="T32">14</text:span></text:p>
            <text:p co:para-mark-style-name="T32" text:style-name="P14"><text:span text:style-name="T32">(СК 1TG23XK01 пом. 1ГА401/2)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" text:style-name="P14"><text:span text:style-name="T32">ВП пан. 1</text:span><text:span text:style-name="T32">HR</text:span><text:span text:style-name="T32">14 поз. 1</text:span><text:span text:style-name="T32">HR</text:span><text:span text:style-name="T32">14</text:span><text:span text:style-name="T32">P</text:span><text:span text:style-name="T32">01 (РМТ-59А)</text:span></text:p>
          </table:table-cell>
          <table:table-cell office:value-type="string" table:style-name="Cell2">
            <text:p co:para-mark-style-name="T32" text:style-name="P23"><text:span text:style-name="T32">ИК АКИП</text:span></text:p>
            <text:p co:para-mark-style-name="T32" text:style-name="P23"><text:span text:style-name="T32">ГП: ВЭГ-08</text:span></text:p>
            <text:p co:para-mark-style-name="T3" text:style-name="P23"><text:span text:style-name="T32">PEG-381 Мод </text:span><text:span text:style-name="T32">D</text:span></text:p>
          </table:table-cell>
        </table:table-row>
        <table:table-row table:style-name="Row2">
          <table:table-cell office:value-type="string" table:style-name="Cell2">
            <text:p co:para-mark-style-name="T32" text:style-name="P23"><text:span text:style-name="T32">1TG22T32B1</text:span></text:p>
            <text:p co:para-mark-style-name="T32" text:style-name="P23"><text:span text:style-name="T32">1ГА401/1</text:span></text:p>
          </table:table-cell>
          <table:table-cell office:value-type="string" table:style-name="Cell2">
            <text:p co:para-mark-style-name="T3" text:style-name="P23"><text:span text:style-name="T32">«</text:span><text:span text:style-name="T32">T</text:span><text:span text:style-name="T32">» воды в отсеке 1TG21B02 БВ</text:span></text:p>
          </table:table-cell>
          <table:table-cell office:value-type="string" table:style-name="Cell2">
            <text:p co:para-mark-style-name="T3" text:style-name="P23"><text:span text:style-name="T32">ТС-1388А, </text:span><text:span text:style-name="T32">Pt</text:span><text:span text:style-name="T32">100</text:span></text:p>
            <text:p co:para-mark-style-name="T3" text:style-name="P23"><text:span text:style-name="T32">(</text:span><text:span text:style-name="T32">-50-200</text:span><text:span text:style-name="T32">)</text:span><text:span text:style-name="T32"><text:s text:c="1"/>°С</text:span></text:p>
          </table:table-cell>
          <table:table-cell office:value-type="string" table:style-name="Cell2">
            <text:p co:para-mark-style-name="T3" text:style-name="P14"><text:span text:style-name="T32">1</text:span><text:span text:style-name="T32">HY</text:span><text:span text:style-name="T32">05</text:span></text:p>
            <text:p co:para-mark-style-name="T32" text:style-name="P14"><text:span text:style-name="T32">(СК 1TG22XK02 пом. 1ГА401/1)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" text:style-name="P14"><text:span text:style-name="T32">ВП пан. 1</text:span><text:span text:style-name="T32">HY</text:span><text:span text:style-name="T32">05 поз. 1</text:span><text:span text:style-name="T32">HY</text:span><text:span text:style-name="T32">05</text:span><text:span text:style-name="T32">P</text:span><text:span text:style-name="T32">01 (РМТ-59А) </text:span></text:p>
          </table:table-cell>
          <table:table-cell office:value-type="string" table:style-name="Cell2">
            <text:p co:para-mark-style-name="T32" text:style-name="P23"><text:span text:style-name="T32">ИК АКИП</text:span></text:p>
            <text:p co:para-mark-style-name="T32" text:style-name="P23"><text:span text:style-name="T32">ГП: ВЭГ-08</text:span></text:p>
            <text:p co:para-mark-style-name="T3" text:style-name="P23"><text:span text:style-name="T32">PEG-168 Мод </text:span><text:span text:style-name="T32">D</text:span></text:p>
          </table:table-cell>
        </table:table-row>
        <table:table-row table:style-name="Row3">
          <table:table-cell office:value-type="string" table:style-name="Cell2">
            <text:p co:para-mark-style-name="T32" text:style-name="P23"><text:span text:style-name="T32">1TG23T32B1</text:span></text:p>
            <text:p co:para-mark-style-name="T32" text:style-name="P23"><text:span text:style-name="T32">1ГА401/1</text:span></text:p>
          </table:table-cell>
          <table:table-cell office:value-type="string" table:style-name="Cell2">
            <text:p co:para-mark-style-name="T3" text:style-name="P23"><text:span text:style-name="T32">«</text:span><text:span text:style-name="T32">T</text:span><text:span text:style-name="T32">» воды в отсеке 1TG21B02 БВ</text:span></text:p>
          </table:table-cell>
          <table:table-cell office:value-type="string" table:style-name="Cell2">
            <text:p co:para-mark-style-name="T3" text:style-name="P23"><text:span text:style-name="T32">ТС-1388А, </text:span><text:span text:style-name="T32">Pt</text:span><text:span text:style-name="T32">100</text:span></text:p>
            <text:p co:para-mark-style-name="T3" text:style-name="P23"><text:span text:style-name="T32">(</text:span><text:span text:style-name="T32">-50-200</text:span><text:span text:style-name="T32">)</text:span><text:span text:style-name="T32"><text:s text:c="1"/>°С</text:span></text:p>
          </table:table-cell>
          <table:table-cell office:value-type="string" table:style-name="Cell2">
            <text:p co:para-mark-style-name="T3" text:style-name="P14"><text:span text:style-name="T32">1</text:span><text:span text:style-name="T32">HR</text:span><text:span text:style-name="T32">14</text:span></text:p>
            <text:p co:para-mark-style-name="T32" text:style-name="P14"><text:span text:style-name="T32">(СК 1TG23XK02 пом. 1ГА401/1)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" text:style-name="P14"><text:span text:style-name="T32">ВП пан. 1</text:span><text:span text:style-name="T32">HR</text:span><text:span text:style-name="T32">14 поз. 1</text:span><text:span text:style-name="T32">HR</text:span><text:span text:style-name="T32">14</text:span><text:span text:style-name="T32">P</text:span><text:span text:style-name="T32">01 (РМТ-59А)</text:span></text:p>
          </table:table-cell>
          <table:table-cell office:value-type="string" table:style-name="Cell2">
            <text:p co:para-mark-style-name="T32" text:style-name="P23"><text:span text:style-name="T32">ИК АКИП</text:span></text:p>
            <text:p co:para-mark-style-name="T32" text:style-name="P23"><text:span text:style-name="T32">ГП: ВЭГ-08</text:span></text:p>
            <text:p co:para-mark-style-name="T3" text:style-name="P23"><text:span text:style-name="T32">PEG-381 Мод </text:span><text:span text:style-name="T32">D</text:span></text:p>
          </table:table-cell>
        </table:table-row>
        <table:table-row table:style-name="Row4">
          <table:table-cell office:value-type="string" table:style-name="Cell2">
            <text:p co:para-mark-style-name="T32" text:style-name="P23"><text:span text:style-name="T32">1TG22T33B1</text:span></text:p>
            <text:p co:para-mark-style-name="T32" text:style-name="P23"><text:span text:style-name="T32">1ГА401/3</text:span></text:p>
          </table:table-cell>
          <table:table-cell office:value-type="string" table:style-name="Cell2">
            <text:p co:para-mark-style-name="T3" text:style-name="P23"><text:span text:style-name="T32">«</text:span><text:span text:style-name="T32">T</text:span><text:span text:style-name="T32">» воды в отсеке 1TG21B03 БВ</text:span></text:p>
          </table:table-cell>
          <table:table-cell office:value-type="string" table:style-name="Cell2">
            <text:p co:para-mark-style-name="T3" text:style-name="P23"><text:span text:style-name="T32">ТС-1388А, </text:span><text:span text:style-name="T32">Pt</text:span><text:span text:style-name="T32">100</text:span></text:p>
            <text:p co:para-mark-style-name="T3" text:style-name="P23"><text:span text:style-name="T32">(</text:span><text:span text:style-name="T32">-50-200</text:span><text:span text:style-name="T32">)</text:span><text:span text:style-name="T32"><text:s text:c="1"/>°С</text:span></text:p>
          </table:table-cell>
          <table:table-cell office:value-type="string" table:style-name="Cell2">
            <text:p co:para-mark-style-name="T3" text:style-name="P14"><text:span text:style-name="T32">1</text:span><text:span text:style-name="T32">HY</text:span><text:span text:style-name="T32">05</text:span></text:p>
            <text:p co:para-mark-style-name="T32" text:style-name="P14"><text:span text:style-name="T32">(СК 1TG22XK03 пом. 1ГА401/3)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" text:style-name="P14"><text:span text:style-name="T32">ВП пан. 1</text:span><text:span text:style-name="T32">HY</text:span><text:span text:style-name="T32">05 поз. 1</text:span><text:span text:style-name="T32">HY</text:span><text:span text:style-name="T32">05</text:span><text:span text:style-name="T32">P</text:span><text:span text:style-name="T32">01 (РМТ-59А) </text:span></text:p>
          </table:table-cell>
          <table:table-cell office:value-type="string" table:style-name="Cell2">
            <text:p co:para-mark-style-name="T32" text:style-name="P23"><text:span text:style-name="T32">ИК АКИП</text:span></text:p>
            <text:p co:para-mark-style-name="T32" text:style-name="P23"><text:span text:style-name="T32">ГП: ВЭГ-08</text:span></text:p>
            <text:p co:para-mark-style-name="T3" text:style-name="P23"><text:span text:style-name="T32">PEG-168 Мод </text:span><text:span text:style-name="T32">C</text:span></text:p>
          </table:table-cell>
        </table:table-row>
        <table:table-row table:style-name="Row4">
          <table:table-cell office:value-type="string" table:style-name="Cell5">
            <text:p co:para-mark-style-name="T32" text:style-name="P23"><text:span text:style-name="T32">1TG23T33B1</text:span></text:p>
            <text:p co:para-mark-style-name="T32" text:style-name="P23"><text:span text:style-name="T32">1ГА401/3</text:span></text:p>
          </table:table-cell>
          <table:table-cell office:value-type="string" table:style-name="Cell5">
            <text:p co:para-mark-style-name="T3" text:style-name="P23"><text:span text:style-name="T32">«</text:span><text:span text:style-name="T32">T</text:span><text:span text:style-name="T32">» </text:span><text:span text:style-name="T32">воды в отсеке 1TG21B03 </text:span><text:span text:style-name="T32">БВ</text:span></text:p>
          </table:table-cell>
          <table:table-cell office:value-type="string" table:style-name="Cell5">
            <text:p co:para-mark-style-name="T3" text:style-name="P23"><text:span text:style-name="T32">ТС-1388А, </text:span><text:span text:style-name="T32">Pt</text:span><text:span text:style-name="T32">100</text:span></text:p>
            <text:p co:para-mark-style-name="T3" text:style-name="P23"><text:span text:style-name="T32">(</text:span><text:span text:style-name="T32">-50-200</text:span><text:span text:style-name="T32">)</text:span><text:span text:style-name="T32"><text:s text:c="1"/>°С</text:span></text:p>
          </table:table-cell>
          <table:table-cell office:value-type="string" table:style-name="Cell5">
            <text:p co:para-mark-style-name="T3" text:style-name="P14"><text:span text:style-name="T32">1</text:span><text:span text:style-name="T32">HR</text:span><text:span text:style-name="T32">14</text:span></text:p>
            <text:p co:para-mark-style-name="T32" text:style-name="P14"><text:span text:style-name="T32">(СК 1TG23XK03 пом. 1ГА401/3)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" text:style-name="P14"><text:span text:style-name="T32">ВП пан. 1</text:span><text:span text:style-name="T32">HR</text:span><text:span text:style-name="T32">14 поз. 1</text:span><text:span text:style-name="T32">HR</text:span><text:span text:style-name="T32">14</text:span><text:span text:style-name="T32">P</text:span><text:span text:style-name="T32">01 (РМТ-59А)</text:span></text:p>
          </table:table-cell>
          <table:table-cell office:value-type="string" table:style-name="Cell5">
            <text:p co:para-mark-style-name="T32" text:style-name="P23"><text:span text:style-name="T32">ИК АКИП</text:span></text:p>
            <text:p co:para-mark-style-name="T32" text:style-name="P23"><text:span text:style-name="T32">ГП: ВЭГ-08</text:span></text:p>
            <text:p co:para-mark-style-name="T3" text:style-name="P23"><text:span text:style-name="T32">PEG-381 Мод </text:span><text:span text:style-name="T32">C</text:span></text:p>
          </table:table-cell>
        </table:table-row>
        <table:table-row table:style-name="Row4">
          <table:table-cell office:value-type="string" table:style-name="Cell5">
            <text:p co:para-mark-style-name="T3" text:style-name="P22"><text:span text:style-name="T8">1</text:span><text:span text:style-name="T8">TK</text:span><text:span text:style-name="T8">20</text:span><text:span text:style-name="T8">T</text:span><text:span text:style-name="T8">01</text:span><text:span text:style-name="T8">B</text:span><text:span text:style-name="T8">1</text:span></text:p>
            <text:p co:para-mark-style-name="T8" text:style-name="P22"><text:span text:style-name="T8">1А319</text:span></text:p>
          </table:table-cell>
          <table:table-cell office:value-type="string" table:style-name="Cell7">
            <text:h co:para-mark-style-name="T3" text:outline-level="7" text:style-name="P13"><text:span text:style-name="T3">«Т» воды на всасе подпиточных насосов</text:span></text:h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ИРТ 1730D/A</text:span><text:span text:style-name="T3"><text:s text:c="1"/></text:span></text:p>
            <text:p co:para-mark-style-name="T3" text:style-name="P14"><text:span text:style-name="T32">(0-150) </text:span><text:span text:style-name="T34">о</text:span><text:span text:style-name="T32">С</text:span></text:p>
          </table:table-cell>
          <table:table-cell office:value-type="string" table:style-name="Cell7">
            <text:h co:para-mark-style-name="T3" text:outline-level="7" text:style-name="P13"><text:span text:style-name="T3">1</text:span><text:span text:style-name="T3">HZ</text:span><text:span text:style-name="T3">04</text:span></text:h>
          </table:table-cell>
          <table:table-cell office:value-type="string" table:style-name="Cell6">
            <text:h co:para-mark-style-name="T3" text:outline-level="2" text:style-name="P15"><text:span text:style-name="T35">1</text:span><text:span text:style-name="T35">HZ</text:span><text:span text:style-name="T35">67/5</text:span></text:h>
          </table:table-cell>
          <table:table-cell office:value-type="string" table:style-name="Cell14">
            <text:h co:para-mark-style-name="T3" text:outline-level="7" text:style-name="P13"><text:span text:style-name="T3">1</text:span><text:span text:style-name="T3">HZ</text:span><text:span text:style-name="T3">62/29</text:span></text:h>
            <text:p co:para-mark-style-name="T3" text:style-name="P14"><text:span text:style-name="T32">1HZ63/10</text:span><text:span text:style-name="T36">(</text:span><text:span text:style-name="T36">1</text:span><text:span text:style-name="T36">)</text:span></text:p>
            <text:p co:para-mark-style-name="T3" text:style-name="P14"><text:span text:style-name="T32">1HZ110/21</text:span><text:span text:style-name="T36">(</text:span><text:span text:style-name="T36">1</text:span><text:span text:style-name="T36">)</text:span></text:p>
            <text:p co:para-mark-style-name="T36" text:style-name="P24"/>
          </table:table-cell>
          <table:table-cell office:value-type="string" table:style-name="Cell13">
            <text:p co:para-mark-style-name="T3" text:style-name="P14"><text:span text:style-name="T32">T </text:span><text:span text:style-name="T37">&gt; </text:span><text:span text:style-name="T32">75</text:span></text:p>
            <text:p co:para-mark-style-name="T3" text:style-name="P14"><text:span text:style-name="T32">T </text:span><text:span text:style-name="T37">&gt; </text:span><text:span text:style-name="T32">72</text:span></text:p>
            <text:p co:para-mark-style-name="T3" text:style-name="P14"><text:span text:style-name="T32">T </text:span><text:span text:style-name="T37">&gt; </text:span><text:span text:style-name="T32">75</text:span></text:p>
          </table:table-cell>
          <table:table-cell office:value-type="string" table:style-name="Cell5">
            <text:p co:para-mark-style-name="T32" text:style-name="P14"><text:span text:style-name="T32">1TKF18,37,55</text:span></text:p>
            <text:p co:para-mark-style-name="T3" text:style-name="P14"><text:span text:style-name="T32">1</text:span><text:span text:style-name="T32">TKF</text:span><text:span text:style-name="T32">06</text:span></text:p>
            <text:p co:para-mark-style-name="T32" text:style-name="P14"><text:span text:style-name="T32">Сигнализация</text:span></text:p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5"/>
          </table:table-cell>
        </table:table-row>
        <table:table-row table:style-name="Row4">
          <table:table-cell office:value-type="string" table:style-name="Cell5">
            <text:p co:para-mark-style-name="T3" text:style-name="P22"><text:span text:style-name="T8">1</text:span><text:span text:style-name="T8">TK</text:span><text:span text:style-name="T8">20</text:span><text:span text:style-name="T8">T</text:span><text:span text:style-name="T8">02</text:span><text:span text:style-name="T8">B</text:span><text:span text:style-name="T8">1</text:span></text:p>
            <text:p co:para-mark-style-name="T8" text:style-name="P22"><text:span text:style-name="T8">1А326</text:span></text:p>
          </table:table-cell>
          <table:table-cell office:value-type="string" table:style-name="Cell5">
            <text:p co:para-mark-style-name="T32" text:style-name="P14"><text:span text:style-name="T32">«Т» теплоносителя в трубопроводе сброса в бак боросодержащей воды </text:span></text:p>
          </table:table-cell>
          <table:table-cell office:value-type="string" table:style-name="Cell14">
            <text:h co:para-mark-style-name="T38" text:outline-level="3" text:style-name="P26"><text:span text:style-name="T38">ТС гр. 50П</text:span></text:h>
            <text:p co:para-mark-style-name="T3" text:style-name="P14"><text:span text:style-name="T32">(0-1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5"/>
          </table:table-cell>
        </table:table-row>
        <table:table-row table:style-name="Row4">
          <table:table-cell office:value-type="string" table:style-name="Cell5">
            <text:p co:para-mark-style-name="T8" text:style-name="P22"><text:span text:style-name="T8">1TK20T03B1</text:span></text:p>
            <text:p co:para-mark-style-name="T39" text:style-name="P22"><text:span text:style-name="T8">1А</text:span><text:span text:style-name="T8">319</text:span></text:p>
          </table:table-cell>
          <table:table-cell office:value-type="string" table:style-name="Cell7">
            <text:h co:para-mark-style-name="T39" text:outline-level="7" text:style-name="P13"><text:span text:style-name="T39">«Т» воды на всасе подпиточных насосов</text:span></text:h>
          </table:table-cell>
          <table:table-cell office:value-type="string" table:style-name="Cell14">
            <text:h co:para-mark-style-name="T39" text:outline-level="7" text:style-name="P13"><text:span text:style-name="T39">ТС гр. 50П</text:span></text:h>
            <text:h co:para-mark-style-name="T39" text:outline-level="7" text:style-name="P13"><text:span text:style-name="T39">ИРТ 1730D/A</text:span></text:h>
            <text:h co:para-mark-style-name="T39" text:outline-level="7" text:style-name="P13"><text:span text:style-name="T39">(0-150) </text:span><text:span text:style-name="T40">о</text:span><text:span text:style-name="T39">С</text:span></text:h>
          </table:table-cell>
          <table:table-cell office:value-type="string" table:style-name="Cell7">
            <text:h co:para-mark-style-name="T39" text:outline-level="7" text:style-name="P13"><text:span text:style-name="T39">1</text:span><text:span text:style-name="T39">HZ</text:span><text:span text:style-name="T39">04</text:span></text:h>
          </table:table-cell>
          <table:table-cell office:value-type="string" table:style-name="Cell6">
            <text:h co:para-mark-style-name="T39" text:outline-level="2" text:style-name="P15"><text:span text:style-name="T41">1</text:span><text:span text:style-name="T41">HZ</text:span><text:span text:style-name="T41">79/13</text:span></text:h>
          </table:table-cell>
          <table:table-cell office:value-type="string" table:style-name="Cell7">
            <text:h co:para-mark-style-name="T39" text:outline-level="7" text:style-name="P13"><text:span text:style-name="T39">1HZ62/30</text:span></text:h>
          </table:table-cell>
          <table:table-cell office:value-type="string" table:style-name="Cell5">
            <text:p co:para-mark-style-name="T39" text:style-name="P14"><text:span text:style-name="T8">T </text:span><text:span text:style-name="T8">&gt;</text:span><text:span text:style-name="T8"><text:s text:c="1"/>75</text:span></text:p>
          </table:table-cell>
          <table:table-cell office:value-type="string" table:style-name="Cell5">
            <text:p co:para-mark-style-name="T8" text:style-name="P14"><text:span text:style-name="T8">1TKF18,37,55</text:span></text:p>
            <text:p co:para-mark-style-name="T8" text:style-name="P14"><text:span text:style-name="T8">ИВС</text:span></text:p>
          </table:table-cell>
          <table:table-cell office:value-type="string" table:style-name="Cell13">
            <text:p co:para-mark-style-name="T32" text:style-name="P25"/>
          </table:table-cell>
        </table:table-row>
        <table:table-row table:style-name="Row4">
          <table:table-cell office:value-type="string" table:style-name="Cell5">
            <text:p co:para-mark-style-name="T8" text:style-name="P22"><text:span text:style-name="T8">1TK20T04B1</text:span></text:p>
            <text:p co:para-mark-style-name="T39" text:style-name="P22"><text:span text:style-name="T8">1А</text:span><text:span text:style-name="T8">319</text:span></text:p>
          </table:table-cell>
          <table:table-cell office:value-type="string" table:style-name="Cell7">
            <text:h co:para-mark-style-name="T39" text:outline-level="7" text:style-name="P13"><text:span text:style-name="T39">«Т» воды на всасе подпиточных насосов</text:span></text:h>
          </table:table-cell>
          <table:table-cell office:value-type="string" table:style-name="Cell14">
            <text:h co:para-mark-style-name="T39" text:outline-level="7" text:style-name="P13"><text:span text:style-name="T39">ТС гр. 50П</text:span></text:h>
            <text:h co:para-mark-style-name="T39" text:outline-level="7" text:style-name="P13"><text:span text:style-name="T39">ИРТ 1730D/A</text:span></text:h>
            <text:h co:para-mark-style-name="T39" text:outline-level="7" text:style-name="P13"><text:span text:style-name="T39">(0-150) </text:span><text:span text:style-name="T40">о</text:span><text:span text:style-name="T39">С</text:span></text:h>
          </table:table-cell>
          <table:table-cell office:value-type="string" table:style-name="Cell7">
            <text:h co:para-mark-style-name="T39" text:outline-level="7" text:style-name="P13"><text:span text:style-name="T39">1</text:span><text:span text:style-name="T39">HZ</text:span><text:span text:style-name="T39">04</text:span></text:h>
          </table:table-cell>
          <table:table-cell office:value-type="string" table:style-name="Cell27">
            <text:p co:para-mark-style-name="T12" text:style-name="P14"><text:span text:style-name="T12">─</text:span></text:p>
          </table:table-cell>
          <table:table-cell office:value-type="string" table:style-name="Cell7">
            <text:h co:para-mark-style-name="T39" text:outline-level="7" text:style-name="P13"><text:span text:style-name="T39">1</text:span><text:span text:style-name="T39">HZ</text:span><text:span text:style-name="T39">62/31</text:span></text:h>
          </table:table-cell>
          <table:table-cell office:value-type="string" table:style-name="Cell5">
            <text:p co:para-mark-style-name="T39" text:style-name="P14"><text:span text:style-name="T8">T</text:span><text:span text:style-name="T8"><text:s text:c="1"/></text:span><text:span text:style-name="T8">&gt;</text:span><text:span text:style-name="T8"><text:s text:c="1"/>75</text:span></text:p>
          </table:table-cell>
          <table:table-cell office:value-type="string" table:style-name="Cell5">
            <text:p co:para-mark-style-name="T39" text:style-name="P14"><text:span text:style-name="T8">1</text:span><text:span text:style-name="T8">TKF</text:span><text:span text:style-name="T8">18,37,55</text:span></text:p>
          </table:table-cell>
          <table:table-cell office:value-type="string" table:style-name="Cell13">
            <text:p co:para-mark-style-name="T32" text:style-name="P25"/>
          </table:table-cell>
        </table:table-row>
      </table:table>
      <text:p co:para-mark-style-name="T3" text:style-name="P19"/>
      <text:p co:para-mark-style-name="T3" text:style-name="P19"/>
      <text:p co:para-mark-style-name="T23" text:style-name="P18"><text:span text:style-name="T23">Продолжение таблицы </text:span><text:span text:style-name="T23">Л</text:span><text:span text:style-name="T23">.</text:span><text:span text:style-name="T23">1</text:span></text:p>
      <table:table co:columns-count="9" co:grouping-summary-below="true" co:grouping-summary-right="true" co:rows-count="18" co:show-zero-value="true" table:style-name="Table3" table:use-banding-columns-styles="false" table:use-banding-rows-styles="false" table:use-first-column-styles="false" table:use-first-row-styles="false" table:use-last-column-styles="false" table:use-last-row-styles="false">
        <table:table-column table:style-name="Col19"/>
        <table:table-column table:style-name="Col20"/>
        <table:table-column table:style-name="Col21"/>
        <table:table-column table:style-name="Col22"/>
        <table:table-column table:style-name="Col23"/>
        <table:table-column table:style-name="Col24"/>
        <table:table-column table:style-name="Col25"/>
        <table:table-column table:style-name="Col15"/>
        <table:table-column table:style-name="Col26"/>
        <table:table-row>
          <table:table-cell office:value-type="string" table:style-name="Cell2">
            <text:p co:para-mark-style-name="T32" text:style-name="P14"><text:span text:style-name="T32">1</text:span></text:p>
          </table:table-cell>
          <table:table-cell office:value-type="string" table:style-name="Cell2">
            <text:p co:para-mark-style-name="T32" text:style-name="P14"><text:span text:style-name="T32">2</text:span></text:p>
          </table:table-cell>
          <table:table-cell office:value-type="string" table:style-name="Cell2">
            <text:p co:para-mark-style-name="T32" text:style-name="P14"><text:span text:style-name="T32">3</text:span></text:p>
          </table:table-cell>
          <table:table-cell office:value-type="string" table:style-name="Cell2">
            <text:p co:para-mark-style-name="T32" text:style-name="P14"><text:span text:style-name="T32">4</text:span></text:p>
          </table:table-cell>
          <table:table-cell office:value-type="string" table:style-name="Cell21">
            <text:h co:para-mark-style-name="T35" text:outline-level="2" text:style-name="P15"><text:span text:style-name="T35">5</text:span></text:h>
          </table:table-cell>
          <table:table-cell office:value-type="string" table:style-name="Cell2">
            <text:p co:para-mark-style-name="T32" text:style-name="P14"><text:span text:style-name="T32">6</text:span></text:p>
          </table:table-cell>
          <table:table-cell office:value-type="string" table:style-name="Cell2">
            <text:p co:para-mark-style-name="T32" text:style-name="P14"><text:span text:style-name="T32">7</text:span></text:p>
          </table:table-cell>
          <table:table-cell office:value-type="string" table:style-name="Cell2">
            <text:p co:para-mark-style-name="T32" text:style-name="P14"><text:span text:style-name="T32">8</text:span></text:p>
          </table:table-cell>
          <table:table-cell office:value-type="string" table:style-name="Cell2">
            <text:p co:para-mark-style-name="T32" text:style-name="P14"><text:span text:style-name="T32">9</text:span></text:p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1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2">
            <text:p co:para-mark-style-name="T3" text:style-name="P14"><text:span text:style-name="T32">«Т» воздуха в камере холодного воздуха эл. двигателя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М</text:span></text:h>
            <text:p co:para-mark-style-name="T3" text:style-name="P14"><text:span text:style-name="T32">(0-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2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2">
            <text:p co:para-mark-style-name="T3" text:style-name="P14"><text:span text:style-name="T32">«Т» охлаждающей воды электродвигателя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М</text:span></text:h>
            <text:p co:para-mark-style-name="T3" text:style-name="P14"><text:span text:style-name="T32">(0-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3</text:span><text:span text:style-name="T8">B</text:span><text:span text:style-name="T8">1</text:span></text:p>
            <text:p co:para-mark-style-name="T8" text:style-name="P22"><text:span text:style-name="T8">А119/1</text:span></text:p>
          </table:table-cell>
          <table:table-cell office:value-type="string" table:style-name="Cell2">
            <text:p co:para-mark-style-name="T3" text:style-name="P14"><text:span text:style-name="T32">«Т» воздуха в камере горячего воздуха электродвигателя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М</text:span></text:h>
            <text:p co:para-mark-style-name="T3" text:style-name="P14"><text:span text:style-name="T32">(0-100) 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4</text:span><text:span text:style-name="T8">B</text:span><text:span text:style-name="T8">1</text:span></text:p>
            <text:p co:para-mark-style-name="T8" text:style-name="P22"><text:span text:style-name="T8">1А018/1</text:span></text:p>
          </table:table-cell>
          <table:table-cell office:value-type="string" table:style-name="Cell2">
            <text:p co:para-mark-style-name="T3" text:style-name="P14"><text:span text:style-name="T32">«Т» масла на входе в гидромуфту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5</text:span><text:span text:style-name="T8">B</text:span><text:span text:style-name="T8">1</text:span></text:p>
            <text:p co:para-mark-style-name="T8" text:style-name="P22"><text:span text:style-name="T8">1А018/1</text:span></text:p>
          </table:table-cell>
          <table:table-cell office:value-type="string" table:style-name="Cell2">
            <text:p co:para-mark-style-name="T3" text:style-name="P14"><text:span text:style-name="T32">«Т» масла на выходе из гидромуфты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00) 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6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2">
            <text:p co:para-mark-style-name="T3" text:style-name="P14"><text:span text:style-name="T32">«Т» переднего подшипника электродвигателя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7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2">
            <text:p co:para-mark-style-name="T3" text:style-name="P14"><text:span text:style-name="T32">«Т» заднего подшипника электродвигателя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8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" text:style-name="P14"><text:span text:style-name="T32">«Т» переднего упорного подшипника гидромуфты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09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" text:style-name="P14"><text:span text:style-name="T32">«Т» переднего опорного подшипника гидромуфты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0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" text:style-name="P14"><text:span text:style-name="T32">«Т» заднего подшипника гидромуфты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1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2" text:style-name="P14"><text:span text:style-name="T32">«Т» переднего подшипника ведущего вала редуктора 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2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2" text:style-name="P14"><text:span text:style-name="T32">«Т» заднего опорного подшипника ведущего редуктора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3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2" text:style-name="P14"><text:span text:style-name="T32">«Т» заднего упорного подшипника ведущего редуктора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4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2" text:style-name="P14"><text:span text:style-name="T32">«Т» переднего подшипника ведомого <text:s text:c="1"/>вала редуктора 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5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2" text:style-name="P14"><text:span text:style-name="T32">«Т» заднего подшипника</text:span></text:p>
            <text:p co:para-mark-style-name="T32" text:style-name="P14"><text:span text:style-name="T32">ведомого <text:s text:c="1"/>вала редуктора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6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" text:style-name="P14"><text:span text:style-name="T32">«Т» переднего подшипника подпиточного насоса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7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5">
            <text:p co:para-mark-style-name="T3" text:style-name="P14"><text:span text:style-name="T32">«Т» заднего подшипника подпиточного насоса 1</text:span><text:span text:style-name="T32">TK</text:span><text:span text:style-name="T32">21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─</text:span></text:p>
          </table:table-cell>
          <table:table-cell office:value-type="string" table:style-name="Cell5">
            <text:p co:para-mark-style-name="T32" text:style-name="P14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</table:table>
      <text:p co:para-mark-style-name="T23" text:style-name="P28"/>
      <text:p co:para-mark-style-name="T23" text:style-name="P18"><text:span text:style-name="T23">Продолжение таблицы </text:span><text:span text:style-name="T23">Л</text:span><text:span text:style-name="T23">.1</text:span></text:p>
      <table:table co:columns-count="9" co:grouping-summary-below="true" co:grouping-summary-right="true" co:rows-count="17" co:show-zero-value="true" table:style-name="Table4" table:use-banding-columns-styles="false" table:use-banding-rows-styles="false" table:use-first-column-styles="false" table:use-first-row-styles="false" table:use-last-column-styles="false" table:use-last-row-styles="false">
        <table:table-column table:style-name="Col27"/>
        <table:table-column table:style-name="Col28"/>
        <table:table-column table:style-name="Col29"/>
        <table:table-column table:style-name="Col30"/>
        <table:table-column table:style-name="Col31"/>
        <table:table-column table:style-name="Col32"/>
        <table:table-column table:style-name="Col33"/>
        <table:table-column table:style-name="Col34"/>
        <table:table-column table:style-name="Col35"/>
        <table:table-row>
          <table:table-cell office:value-type="string" table:style-name="Cell2">
            <text:p co:para-mark-style-name="T32" text:style-name="P14"><text:span text:style-name="T32">1</text:span></text:p>
          </table:table-cell>
          <table:table-cell office:value-type="string" table:style-name="Cell2">
            <text:p co:para-mark-style-name="T32" text:style-name="P14"><text:span text:style-name="T32">2</text:span></text:p>
          </table:table-cell>
          <table:table-cell office:value-type="string" table:style-name="Cell2">
            <text:p co:para-mark-style-name="T32" text:style-name="P14"><text:span text:style-name="T32">3</text:span></text:p>
          </table:table-cell>
          <table:table-cell office:value-type="string" table:style-name="Cell2">
            <text:p co:para-mark-style-name="T32" text:style-name="P14"><text:span text:style-name="T32">4</text:span></text:p>
          </table:table-cell>
          <table:table-cell office:value-type="string" table:style-name="Cell21">
            <text:h co:para-mark-style-name="T35" text:outline-level="2" text:style-name="P15"><text:span text:style-name="T35">5</text:span></text:h>
          </table:table-cell>
          <table:table-cell office:value-type="string" table:style-name="Cell2">
            <text:p co:para-mark-style-name="T32" text:style-name="P14"><text:span text:style-name="T32">6</text:span></text:p>
          </table:table-cell>
          <table:table-cell office:value-type="string" table:style-name="Cell2">
            <text:p co:para-mark-style-name="T32" text:style-name="P14"><text:span text:style-name="T32">7</text:span></text:p>
          </table:table-cell>
          <table:table-cell office:value-type="string" table:style-name="Cell2">
            <text:p co:para-mark-style-name="T32" text:style-name="P14"><text:span text:style-name="T32">8</text:span></text:p>
          </table:table-cell>
          <table:table-cell office:value-type="string" table:style-name="Cell2">
            <text:p co:para-mark-style-name="T32" text:style-name="P14"><text:span text:style-name="T32">9</text:span></text:p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1</text:span><text:span text:style-name="T8">T</text:span><text:span text:style-name="T8">18</text:span><text:span text:style-name="T8">B</text:span><text:span text:style-name="T8">1</text:span></text:p>
            <text:p co:para-mark-style-name="T8" text:style-name="P22"><text:span text:style-name="T8">1А119/1</text:span></text:p>
          </table:table-cell>
          <table:table-cell office:value-type="string" table:style-name="Cell2">
            <text:p co:para-mark-style-name="T32" text:style-name="P14"><text:span text:style-name="T32">«Т» воды в камере за гидропятой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2</text:span><text:span text:style-name="T8">T</text:span><text:span text:style-name="T8">01</text:span><text:span text:style-name="T8">B</text:span><text:span text:style-name="T8">1</text:span></text:p>
            <text:p co:para-mark-style-name="T8" text:style-name="P22"><text:span text:style-name="T8">1А119/2</text:span></text:p>
          </table:table-cell>
          <table:table-cell office:value-type="string" table:style-name="Cell2">
            <text:p co:para-mark-style-name="T3" text:style-name="P14"><text:span text:style-name="T32">«Т» воздуха в камере холодного воздуха электродвигателя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М</text:span></text:h>
            <text:p co:para-mark-style-name="T3" text:style-name="P14"><text:span text:style-name="T32">(0-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3" text:style-name="P22"><text:span text:style-name="T8">1</text:span><text:span text:style-name="T8">TK</text:span><text:span text:style-name="T8">22</text:span><text:span text:style-name="T8">T</text:span><text:span text:style-name="T8">02</text:span><text:span text:style-name="T8">B</text:span><text:span text:style-name="T8">1</text:span></text:p>
            <text:p co:para-mark-style-name="T8" text:style-name="P22"><text:span text:style-name="T8">1А119/2</text:span></text:p>
          </table:table-cell>
          <table:table-cell office:value-type="string" table:style-name="Cell2">
            <text:p co:para-mark-style-name="T3" text:style-name="P14"><text:span text:style-name="T32">«Т» охлаждающей воды электродвигателя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М</text:span></text:h>
            <text:p co:para-mark-style-name="T3" text:style-name="P14"><text:span text:style-name="T32">(0-50)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8" text:style-name="P22"><text:span text:style-name="T8">1TK22T03B1</text:span></text:p>
            <text:p co:para-mark-style-name="T3" text:style-name="P22"><text:span text:style-name="T8">1А</text:span><text:span text:style-name="T8">119/2</text:span></text:p>
          </table:table-cell>
          <table:table-cell office:value-type="string" table:style-name="Cell2">
            <text:p co:para-mark-style-name="T3" text:style-name="P14"><text:span text:style-name="T32">«Т» воздуха в камере горячего воздуха электродвигателя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М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8" text:style-name="P22"><text:span text:style-name="T8">1TK22T04B1</text:span></text:p>
            <text:p co:para-mark-style-name="T3" text:style-name="P22"><text:span text:style-name="T8">1А</text:span><text:span text:style-name="T8">018/2</text:span></text:p>
          </table:table-cell>
          <table:table-cell office:value-type="string" table:style-name="Cell2">
            <text:p co:para-mark-style-name="T3" text:style-name="P14"><text:span text:style-name="T32">«Т» масла на входе гидромуфты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8" text:style-name="P22"><text:span text:style-name="T8">1TK22T05B1</text:span></text:p>
            <text:p co:para-mark-style-name="T3" text:style-name="P22"><text:span text:style-name="T8">1А</text:span><text:span text:style-name="T8">018/2</text:span></text:p>
          </table:table-cell>
          <table:table-cell office:value-type="string" table:style-name="Cell2">
            <text:p co:para-mark-style-name="T3" text:style-name="P14"><text:span text:style-name="T32">«Т» масла на выходе гидромуфты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8" text:style-name="P22"><text:span text:style-name="T8">1TK22T06B1</text:span></text:p>
            <text:p co:para-mark-style-name="T3" text:style-name="P22"><text:span text:style-name="T8">1А</text:span><text:span text:style-name="T8">119/2</text:span></text:p>
          </table:table-cell>
          <table:table-cell office:value-type="string" table:style-name="Cell2">
            <text:p co:para-mark-style-name="T3" text:style-name="P14"><text:span text:style-name="T32">«Т» переднего подшипника электродвигателя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2">
            <text:p co:para-mark-style-name="T8" text:style-name="P22"><text:span text:style-name="T8">1TK22T07B1</text:span></text:p>
            <text:p co:para-mark-style-name="T3" text:style-name="P22"><text:span text:style-name="T8">1А</text:span><text:span text:style-name="T8">119/2</text:span></text:p>
          </table:table-cell>
          <table:table-cell office:value-type="string" table:style-name="Cell2">
            <text:p co:para-mark-style-name="T3" text:style-name="P14"><text:span text:style-name="T32">«Т» заднего подшипника электродвигателя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13"><text:span text:style-name="T3">ТС гр. 50П</text:span></text:h>
            <text:p co:para-mark-style-name="T3" text:style-name="P14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─</text:span></text:p>
          </table:table-cell>
          <table:table-cell office:value-type="string" table:style-name="Cell2">
            <text:p co:para-mark-style-name="T32" text:style-name="P14"><text:span text:style-name="T32">ИВС</text:span></text:p>
          </table:table-cell>
          <table:table-cell office:value-type="string" table:style-name="Cell8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08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2" text:style-name="P30"><text:span text:style-name="T32">«Т» переднего упорного подшипника гидромуфты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 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09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2" text:style-name="P30"><text:span text:style-name="T32">«Т» переднего опорного подшипника гидромуфты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 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10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" text:style-name="P30"><text:span text:style-name="T32">«Т» заднего подшипника гидромуфты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11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2" text:style-name="P30"><text:span text:style-name="T32">«Т» переднего подшипника</text:span></text:p>
            <text:p co:para-mark-style-name="T32" text:style-name="P30"><text:span text:style-name="T32">ведущего вала редуктора 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12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2" text:style-name="P30"><text:span text:style-name="T32">«Т» заднего опорного подшипника ведущего редуктора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13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2" text:style-name="P30"><text:span text:style-name="T32">«Т» заднего упорного подшипника ведущего редуктора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14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2" text:style-name="P30"><text:span text:style-name="T32">«Т» переднего подшипника</text:span></text:p>
            <text:p co:para-mark-style-name="T32" text:style-name="P30"><text:span text:style-name="T32">ведомого вала редуктора 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  <table:table-row>
          <table:table-cell office:value-type="string" table:style-name="Cell5">
            <text:p co:para-mark-style-name="T8" text:style-name="P29"><text:span text:style-name="T8">1TK22T15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2" text:style-name="P30"><text:span text:style-name="T32">«Т» заднего подшипника</text:span></text:p>
            <text:p co:para-mark-style-name="T32" text:style-name="P30"><text:span text:style-name="T32">ведомого <text:s text:c="1"/>вала редуктора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27"/>
          </table:table-cell>
        </table:table-row>
      </table:table>
      <text:p co:para-mark-style-name="T3" text:style-name="P19"/>
      <text:p co:para-mark-style-name="T3" text:style-name="P19"/>
      <text:p co:para-mark-style-name="T3" text:style-name="P19"/>
      <text:p co:para-mark-style-name="T3" text:style-name="P19"/>
      <text:p co:para-mark-style-name="T23" text:style-name="P18"><text:span text:style-name="T23">Продолжение таблицы </text:span><text:span text:style-name="T23">Л</text:span><text:span text:style-name="T23">.1</text:span></text:p>
      <table:table co:columns-count="9" co:grouping-summary-below="true" co:grouping-summary-right="true" co:rows-count="16" co:show-zero-value="true" table:style-name="Table5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36"/>
        <table:table-column table:style-name="Col37"/>
        <table:table-column table:style-name="Col38"/>
        <table:table-column table:style-name="Col39"/>
        <table:table-column table:style-name="Col38"/>
        <table:table-column table:style-name="Col38"/>
        <table:table-column table:style-name="Col40"/>
        <table:table-column table:style-name="Col41"/>
        <table:table-row>
          <table:table-cell office:value-type="string" table:style-name="Cell2">
            <text:p co:para-mark-style-name="T32" text:style-name="P14"><text:span text:style-name="T32">1</text:span></text:p>
          </table:table-cell>
          <table:table-cell office:value-type="string" table:style-name="Cell2">
            <text:p co:para-mark-style-name="T32" text:style-name="P14"><text:span text:style-name="T32">2</text:span></text:p>
          </table:table-cell>
          <table:table-cell office:value-type="string" table:style-name="Cell2">
            <text:p co:para-mark-style-name="T32" text:style-name="P14"><text:span text:style-name="T32">3</text:span></text:p>
          </table:table-cell>
          <table:table-cell office:value-type="string" table:style-name="Cell2">
            <text:p co:para-mark-style-name="T32" text:style-name="P14"><text:span text:style-name="T32">4</text:span></text:p>
          </table:table-cell>
          <table:table-cell office:value-type="string" table:style-name="Cell21">
            <text:h co:para-mark-style-name="T35" text:outline-level="2" text:style-name="P15"><text:span text:style-name="T35">5</text:span></text:h>
          </table:table-cell>
          <table:table-cell office:value-type="string" table:style-name="Cell2">
            <text:p co:para-mark-style-name="T32" text:style-name="P14"><text:span text:style-name="T32">6</text:span></text:p>
          </table:table-cell>
          <table:table-cell office:value-type="string" table:style-name="Cell2">
            <text:p co:para-mark-style-name="T32" text:style-name="P14"><text:span text:style-name="T32">7</text:span></text:p>
          </table:table-cell>
          <table:table-cell office:value-type="string" table:style-name="Cell2">
            <text:p co:para-mark-style-name="T32" text:style-name="P14"><text:span text:style-name="T32">8</text:span></text:p>
          </table:table-cell>
          <table:table-cell office:value-type="string" table:style-name="Cell2">
            <text:p co:para-mark-style-name="T32" text:style-name="P14"><text:span text:style-name="T32">9</text:span></text:p>
          </table:table-cell>
        </table:table-row>
        <table:table-row>
          <table:table-cell office:value-type="string" table:style-name="Cell5">
            <text:p co:para-mark-style-name="T8" text:style-name="P29"><text:span text:style-name="T8">1TK22T16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5">
            <text:p co:para-mark-style-name="T3" text:style-name="P30"><text:span text:style-name="T32">«Т» переднего подшипника подпиточного насоса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─</text:span></text:p>
          </table:table-cell>
          <table:table-cell office:value-type="string" table:style-name="Cell5">
            <text:p co:para-mark-style-name="T32" text:style-name="P30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  <table:table-row>
          <table:table-cell office:value-type="string" table:style-name="Cell2">
            <text:p co:para-mark-style-name="T8" text:style-name="P29"><text:span text:style-name="T8">1TK22T17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2">
            <text:p co:para-mark-style-name="T3" text:style-name="P30"><text:span text:style-name="T32">«Т» заднего подшипника подпиточного насоса 1</text:span><text:span text:style-name="T32">TK</text:span><text:span text:style-name="T32">22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1"><text:span text:style-name="T3">ТС гр. 50П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ИВС</text:span></text:p>
          </table:table-cell>
          <table:table-cell office:value-type="string" table:style-name="Cell8">
            <text:p co:para-mark-style-name="T32" text:style-name="P32"/>
          </table:table-cell>
        </table:table-row>
        <table:table-row>
          <table:table-cell office:value-type="string" table:style-name="Cell2">
            <text:p co:para-mark-style-name="T8" text:style-name="P29"><text:span text:style-name="T8">1TK22T18B1</text:span></text:p>
            <text:p co:para-mark-style-name="T3" text:style-name="P29"><text:span text:style-name="T8">1А</text:span><text:span text:style-name="T8">119/2</text:span></text:p>
          </table:table-cell>
          <table:table-cell office:value-type="string" table:style-name="Cell2">
            <text:p co:para-mark-style-name="T32" text:style-name="P30"><text:span text:style-name="T32">«Т» воды в камере за гидропятой</text:span></text:p>
          </table:table-cell>
          <table:table-cell office:value-type="string" table:style-name="Cell3">
            <text:h co:para-mark-style-name="T3" text:outline-level="7" text:style-name="P31"><text:span text:style-name="T3">ТС гр. 50П</text:span></text:h>
            <text:p co:para-mark-style-name="T3" text:style-name="P30"><text:span text:style-name="T32">(0-150) 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ИВС</text:span></text:p>
          </table:table-cell>
          <table:table-cell office:value-type="string" table:style-name="Cell8">
            <text:p co:para-mark-style-name="T32" text:style-name="P32"/>
          </table:table-cell>
        </table:table-row>
        <table:table-row>
          <table:table-cell office:value-type="string" table:style-name="Cell2">
            <text:p co:para-mark-style-name="T8" text:style-name="P29"><text:span text:style-name="T8">1TK23T01B1</text:span></text:p>
            <text:p co:para-mark-style-name="T3" text:style-name="P29"><text:span text:style-name="T8">1А</text:span><text:span text:style-name="T8">119/3</text:span></text:p>
          </table:table-cell>
          <table:table-cell office:value-type="string" table:style-name="Cell2">
            <text:p co:para-mark-style-name="T3" text:style-name="P30"><text:span text:style-name="T32">«Т» воздуха в камере холодного воздуха электродвигателя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1"><text:span text:style-name="T3">ТС гр. 50М</text:span></text:h>
            <text:p co:para-mark-style-name="T3" text:style-name="P30"><text:span text:style-name="T32">(0-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ИВС</text:span></text:p>
          </table:table-cell>
          <table:table-cell office:value-type="string" table:style-name="Cell8">
            <text:p co:para-mark-style-name="T32" text:style-name="P32"/>
          </table:table-cell>
        </table:table-row>
        <table:table-row>
          <table:table-cell office:value-type="string" table:style-name="Cell2">
            <text:p co:para-mark-style-name="T8" text:style-name="P29"><text:span text:style-name="T8">1TK23T02B1</text:span></text:p>
            <text:p co:para-mark-style-name="T3" text:style-name="P29"><text:span text:style-name="T8">1А</text:span><text:span text:style-name="T8">119/3</text:span></text:p>
          </table:table-cell>
          <table:table-cell office:value-type="string" table:style-name="Cell2">
            <text:p co:para-mark-style-name="T3" text:style-name="P30"><text:span text:style-name="T32">«Т» охлаждающей воды электродвигателя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1"><text:span text:style-name="T3">ТС гр. 50М</text:span></text:h>
            <text:p co:para-mark-style-name="T3" text:style-name="P30"><text:span text:style-name="T32">(0-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ИВС</text:span></text:p>
          </table:table-cell>
          <table:table-cell office:value-type="string" table:style-name="Cell8">
            <text:p co:para-mark-style-name="T32" text:style-name="P32"/>
          </table:table-cell>
        </table:table-row>
        <table:table-row>
          <table:table-cell office:value-type="string" table:style-name="Cell2">
            <text:p co:para-mark-style-name="T8" text:style-name="P29"><text:span text:style-name="T8">1TK23T03B1</text:span></text:p>
            <text:p co:para-mark-style-name="T3" text:style-name="P29"><text:span text:style-name="T8">1А</text:span><text:span text:style-name="T8">119/3</text:span></text:p>
          </table:table-cell>
          <table:table-cell office:value-type="string" table:style-name="Cell2">
            <text:p co:para-mark-style-name="T3" text:style-name="P30"><text:span text:style-name="T32">«Т» воздуха в камере горячего воздуха электродвигателя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1"><text:span text:style-name="T3">ТС гр. 50М</text:span></text:h>
            <text:p co:para-mark-style-name="T3" text:style-name="P30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─</text:span></text:p>
          </table:table-cell>
          <table:table-cell office:value-type="string" table:style-name="Cell2">
            <text:p co:para-mark-style-name="T32" text:style-name="P30"><text:span text:style-name="T32">ИВС</text:span></text:p>
          </table:table-cell>
          <table:table-cell office:value-type="string" table:style-name="Cell8">
            <text:p co:para-mark-style-name="T32" text:style-name="P32"/>
          </table:table-cell>
        </table:table-row>
        <table:table-row>
          <table:table-cell office:value-type="string" table:style-name="Cell2">
            <text:p co:para-mark-style-name="T8" text:style-name="P33"><text:span text:style-name="T8">1TK23T04B1</text:span></text:p>
            <text:p co:para-mark-style-name="T3" text:style-name="P33"><text:span text:style-name="T8">1А</text:span><text:span text:style-name="T8">018/3</text:span></text:p>
          </table:table-cell>
          <table:table-cell office:value-type="string" table:style-name="Cell2">
            <text:p co:para-mark-style-name="T3" text:style-name="P2"><text:span text:style-name="T32">«Т» масла на входе гидромуфты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2"/>
          </table:table-cell>
        </table:table-row>
        <table:table-row>
          <table:table-cell office:value-type="string" table:style-name="Cell2">
            <text:p co:para-mark-style-name="T8" text:style-name="P33"><text:span text:style-name="T8">1TK23T05B1</text:span></text:p>
            <text:p co:para-mark-style-name="T3" text:style-name="P33"><text:span text:style-name="T8">1А</text:span><text:span text:style-name="T8">018/3</text:span></text:p>
          </table:table-cell>
          <table:table-cell office:value-type="string" table:style-name="Cell2">
            <text:p co:para-mark-style-name="T3" text:style-name="P2"><text:span text:style-name="T32">«Т» масла на выходе гидромуфты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2"/>
          </table:table-cell>
        </table:table-row>
        <table:table-row>
          <table:table-cell office:value-type="string" table:style-name="Cell5">
            <text:p co:para-mark-style-name="T8" text:style-name="P33"><text:span text:style-name="T8">1TK23T06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5">
            <text:p co:para-mark-style-name="T3" text:style-name="P2"><text:span text:style-name="T32">«Т» переднего подшипника электродвигателя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  <table:table-row>
          <table:table-cell office:value-type="string" table:style-name="Cell5">
            <text:p co:para-mark-style-name="T8" text:style-name="P33"><text:span text:style-name="T8">1TK23T07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5">
            <text:p co:para-mark-style-name="T3" text:style-name="P2"><text:span text:style-name="T32">«Т» заднего подшипника электродвигателя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  <table:table-row>
          <table:table-cell office:value-type="string" table:style-name="Cell5">
            <text:p co:para-mark-style-name="T8" text:style-name="P33"><text:span text:style-name="T8">1TK23T08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5">
            <text:p co:para-mark-style-name="T32" text:style-name="P2"><text:span text:style-name="T32">«Т» переднего упорного подшипника гидромуфты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  <table:table-row>
          <table:table-cell office:value-type="string" table:style-name="Cell5">
            <text:p co:para-mark-style-name="T8" text:style-name="P33"><text:span text:style-name="T8">1TK23T09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5">
            <text:p co:para-mark-style-name="T32" text:style-name="P2"><text:span text:style-name="T32">«Т» переднего опорного подшипника гидромуфты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  <table:table-row>
          <table:table-cell office:value-type="string" table:style-name="Cell5">
            <text:p co:para-mark-style-name="T8" text:style-name="P33"><text:span text:style-name="T8">1TK23T10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5">
            <text:p co:para-mark-style-name="T3" text:style-name="P2"><text:span text:style-name="T32">«Т» заднего подшипника гидромуфты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  <table:table-row>
          <table:table-cell office:value-type="string" table:style-name="Cell5">
            <text:p co:para-mark-style-name="T8" text:style-name="P33"><text:span text:style-name="T8">1TK23T11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5">
            <text:p co:para-mark-style-name="T32" text:style-name="P2"><text:span text:style-name="T32">«Т» переднего подшипника ведущего вала редуктора 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  <table:table-row>
          <table:table-cell office:value-type="string" table:style-name="Cell5">
            <text:p co:para-mark-style-name="T8" text:style-name="P33"><text:span text:style-name="T8">1TK23T12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5">
            <text:p co:para-mark-style-name="T32" text:style-name="P2"><text:span text:style-name="T32">«Т» заднего опорного подшипника ведущего редуктора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100) 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2"/>
          </table:table-cell>
        </table:table-row>
      </table:table>
      <text:p co:para-mark-style-name="T23" text:style-name="P28"/>
      <text:p co:para-mark-style-name="T23" text:style-name="P28"/>
      <text:p co:para-mark-style-name="T23" text:style-name="P28"/>
      <text:p co:para-mark-style-name="T23" text:style-name="P18"><text:span text:style-name="T23">Продолжение таблицы </text:span><text:span text:style-name="T23">Л</text:span><text:span text:style-name="T23">.1</text:span></text:p>
      <table:table co:columns-count="9" co:grouping-summary-below="true" co:grouping-summary-right="true" co:rows-count="12" co:show-zero-value="true" table:style-name="Table6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42"/>
        <table:table-column table:style-name="Col43"/>
        <table:table-column table:style-name="Col44"/>
        <table:table-column table:style-name="Col38"/>
        <table:table-column table:style-name="Col45"/>
        <table:table-column table:style-name="Col38"/>
        <table:table-column table:style-name="Col46"/>
        <table:table-column table:style-name="Col47"/>
        <table:table-row>
          <table:table-cell office:value-type="string" table:style-name="Cell2">
            <text:p co:para-mark-style-name="T32" text:style-name="P14"><text:span text:style-name="T32">1</text:span></text:p>
          </table:table-cell>
          <table:table-cell office:value-type="string" table:style-name="Cell2">
            <text:p co:para-mark-style-name="T32" text:style-name="P14"><text:span text:style-name="T32">2</text:span></text:p>
          </table:table-cell>
          <table:table-cell office:value-type="string" table:style-name="Cell2">
            <text:p co:para-mark-style-name="T32" text:style-name="P14"><text:span text:style-name="T32">3</text:span></text:p>
          </table:table-cell>
          <table:table-cell office:value-type="string" table:style-name="Cell2">
            <text:p co:para-mark-style-name="T32" text:style-name="P14"><text:span text:style-name="T32">4</text:span></text:p>
          </table:table-cell>
          <table:table-cell office:value-type="string" table:style-name="Cell21">
            <text:h co:para-mark-style-name="T35" text:outline-level="2" text:style-name="P15"><text:span text:style-name="T35">5</text:span></text:h>
          </table:table-cell>
          <table:table-cell office:value-type="string" table:style-name="Cell2">
            <text:p co:para-mark-style-name="T32" text:style-name="P14"><text:span text:style-name="T32">6</text:span></text:p>
          </table:table-cell>
          <table:table-cell office:value-type="string" table:style-name="Cell2">
            <text:p co:para-mark-style-name="T32" text:style-name="P14"><text:span text:style-name="T32">7</text:span></text:p>
          </table:table-cell>
          <table:table-cell office:value-type="string" table:style-name="Cell2">
            <text:p co:para-mark-style-name="T32" text:style-name="P14"><text:span text:style-name="T32">8</text:span></text:p>
          </table:table-cell>
          <table:table-cell office:value-type="string" table:style-name="Cell2">
            <text:p co:para-mark-style-name="T32" text:style-name="P14"><text:span text:style-name="T32">9</text:span></text:p>
          </table:table-cell>
        </table:table-row>
        <table:table-row>
          <table:table-cell office:value-type="string" table:style-name="Cell2">
            <text:p co:para-mark-style-name="T3" text:style-name="P33"><text:span text:style-name="T8">1</text:span><text:span text:style-name="T8">TK</text:span><text:span text:style-name="T8">23</text:span><text:span text:style-name="T8">T</text:span><text:span text:style-name="T8">13</text:span><text:span text:style-name="T8">B</text:span><text:span text:style-name="T8">1</text:span></text:p>
            <text:p co:para-mark-style-name="T8" text:style-name="P33"><text:span text:style-name="T8">1А119/3</text:span></text:p>
          </table:table-cell>
          <table:table-cell office:value-type="string" table:style-name="Cell2">
            <text:p co:para-mark-style-name="T32" text:style-name="P2"><text:span text:style-name="T32">«Т» заднего упорного подшипника ведущего редуктора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2">
            <text:p co:para-mark-style-name="T8" text:style-name="P33"><text:span text:style-name="T8">1TK23T14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2">
            <text:p co:para-mark-style-name="T32" text:style-name="P2"><text:span text:style-name="T32">«Т» переднего подшипника ведомого <text:s text:c="1"/>вала редуктора 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2">
            <text:p co:para-mark-style-name="T8" text:style-name="P33"><text:span text:style-name="T8">1TK23T15B1</text:span></text:p>
            <text:p co:para-mark-style-name="T8" text:style-name="P33"><text:span text:style-name="T8">1А119/3</text:span></text:p>
          </table:table-cell>
          <table:table-cell office:value-type="string" table:style-name="Cell2">
            <text:p co:para-mark-style-name="T32" text:style-name="P2"><text:span text:style-name="T32">«Т» заднего подшипника ведомого <text:s text:c="1"/>вала редуктора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2">
            <text:p co:para-mark-style-name="T8" text:style-name="P33"><text:span text:style-name="T8">1TK23T16B1</text:span></text:p>
            <text:p co:para-mark-style-name="T8" text:style-name="P33"><text:span text:style-name="T8">1А119/3</text:span></text:p>
          </table:table-cell>
          <table:table-cell office:value-type="string" table:style-name="Cell2">
            <text:p co:para-mark-style-name="T3" text:style-name="P2"><text:span text:style-name="T32">«Т» переднего подшипника подпиточного насоса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2">
            <text:p co:para-mark-style-name="T8" text:style-name="P33"><text:span text:style-name="T8">1TK23T17B1</text:span></text:p>
            <text:p co:para-mark-style-name="T8" text:style-name="P33"><text:span text:style-name="T8">1А119/3</text:span></text:p>
          </table:table-cell>
          <table:table-cell office:value-type="string" table:style-name="Cell2">
            <text:p co:para-mark-style-name="T3" text:style-name="P2"><text:span text:style-name="T32">«Т» заднего подшипника подпиточного насоса 1</text:span><text:span text:style-name="T32">TK</text:span><text:span text:style-name="T32">23</text:span><text:span text:style-name="T32">D</text:span><text:span text:style-name="T32">02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2">
            <text:p co:para-mark-style-name="T8" text:style-name="P33"><text:span text:style-name="T8">1TK23T18B1</text:span></text:p>
            <text:p co:para-mark-style-name="T3" text:style-name="P33"><text:span text:style-name="T8">1А</text:span><text:span text:style-name="T8">119/3</text:span></text:p>
          </table:table-cell>
          <table:table-cell office:value-type="string" table:style-name="Cell2">
            <text:p co:para-mark-style-name="T32" text:style-name="P2"><text:span text:style-name="T32">«Т» воды в камере за гидропятой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2">
            <text:p co:para-mark-style-name="T8" text:style-name="P33"><text:span text:style-name="T8">1TK40T01B1</text:span></text:p>
            <text:p co:para-mark-style-name="T8" text:style-name="P33"><text:span text:style-name="T8">1ГА408</text:span></text:p>
          </table:table-cell>
          <table:table-cell office:value-type="string" table:style-name="Cell2">
            <text:p co:para-mark-style-name="T3" text:style-name="P2"><text:span text:style-name="T32">«Т» подпиточной воды после регенеративного теплообменника 1</text:span><text:span text:style-name="T32">TK</text:span><text:span text:style-name="T32">80</text:span><text:span text:style-name="T32">W</text:span><text:span text:style-name="T32">01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ИРТ</text:span><text:span text:style-name="T32"><text:s text:c="1"/></text:span><text:span text:style-name="T32">1730D</text:span><text:span text:style-name="T32">/</text:span><text:span text:style-name="T32">A </text:span><text:span text:style-name="T3"><text:s text:c="1"/></text:span></text:p>
            <text:p co:para-mark-style-name="T3" text:style-name="P2"><text:span text:style-name="T32">(0-4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4">
            <text:h co:para-mark-style-name="T3" text:outline-level="7" text:style-name="P34"><text:span text:style-name="T3">1</text:span><text:span text:style-name="T3">HZ</text:span><text:span text:style-name="T3">04</text:span></text:h>
          </table:table-cell>
          <table:table-cell office:value-type="string" table:style-name="Cell21">
            <text:h co:para-mark-style-name="T35" text:outline-level="2" text:style-name="P36"><text:span text:style-name="T35">1HZ97/4</text:span></text:h>
          </table:table-cell>
          <table:table-cell office:value-type="string" table:style-name="Cell8">
            <text:h co:para-mark-style-name="T3" text:outline-level="1" text:style-name="P37"><text:span text:style-name="T3">1HZ110/20</text:span><text:span text:style-name="T42">(</text:span><text:span text:style-name="T42">1</text:span><text:span text:style-name="T42">)</text:span></text:h>
            <text:p co:para-mark-style-name="T36" text:style-name="P38"/>
          </table:table-cell>
          <table:table-cell office:value-type="string" table:style-name="Cell8">
            <text:p co:para-mark-style-name="T3" text:style-name="P2"><text:span text:style-name="T32">T </text:span><text:span text:style-name="T37">&lt;</text:span><text:span text:style-name="T32"><text:s text:c="1"/>260</text:span></text:p>
          </table:table-cell>
          <table:table-cell office:value-type="string" table:style-name="Cell2">
            <text:p co:para-mark-style-name="T32" text:style-name="P2"><text:span text:style-name="T32">Сигнализация</text:span></text:p>
            <text:p co:para-mark-style-name="T32" text:style-name="P2"><text:span text:style-name="T32">Ком. сеть</text:span></text:p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2">
            <text:p co:para-mark-style-name="T8" text:style-name="P33"><text:span text:style-name="T8">1TK70T01B1</text:span></text:p>
            <text:p co:para-mark-style-name="T3" text:style-name="P33"><text:span text:style-name="T8">1А</text:span><text:span text:style-name="T8">424</text:span></text:p>
          </table:table-cell>
          <table:table-cell office:value-type="string" table:style-name="Cell2">
            <text:p co:para-mark-style-name="T3" text:style-name="P2"><text:span text:style-name="T32">«Т» конденсата на входе в деаэратор борного регулирования 1</text:span><text:span text:style-name="T32">TK</text:span><text:span text:style-name="T32">70</text:span><text:span text:style-name="T32">W</text:span><text:span text:style-name="T32">01 </text:span></text:p>
          </table:table-cell>
          <table:table-cell office:value-type="string" table:style-name="Cell3">
            <text:h co:para-mark-style-name="T3" text:outline-level="7" text:style-name="P34"><text:span text:style-name="T3">ТС гр. 50П</text:span></text:h>
            <text:p co:para-mark-style-name="T3" text:style-name="P2"><text:span text:style-name="T32">(0-10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─</text:span></text:p>
          </table:table-cell>
          <table:table-cell office:value-type="string" table:style-name="Cell2">
            <text:p co:para-mark-style-name="T32" text:style-name="P2"><text:span text:style-name="T32">ИВС</text:span></text:p>
          </table:table-cell>
          <table:table-cell office:value-type="string" table:style-name="Cell8">
            <text:p co:para-mark-style-name="T32" text:style-name="P35"/>
          </table:table-cell>
        </table:table-row>
        <table:table-row>
          <table:table-cell office:value-type="string" table:style-name="Cell5">
            <text:p co:para-mark-style-name="T8" text:style-name="P33"><text:span text:style-name="T8">1TK80T01B1</text:span></text:p>
            <text:p co:para-mark-style-name="T3" text:style-name="P33"><text:span text:style-name="T8">1ГА</text:span><text:span text:style-name="T8">306/3</text:span></text:p>
          </table:table-cell>
          <table:table-cell office:value-type="string" table:style-name="Cell5">
            <text:p co:para-mark-style-name="T3" text:style-name="P2"><text:span text:style-name="T32">«Т» продувочной воды после доохладителя продувки 1</text:span><text:span text:style-name="T32">TK</text:span><text:span text:style-name="T32">80</text:span><text:span text:style-name="T32">W</text:span><text:span text:style-name="T32">02</text:span></text:p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p co:para-mark-style-name="T3" text:style-name="P2"><text:span text:style-name="T32">(0-150)</text:span><text:span text:style-name="T32"><text:s text:c="1"/></text:span><text:span text:style-name="T34">о</text:span><text:span text:style-name="T32">С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5">
            <text:p co:para-mark-style-name="T32" text:style-name="P2"><text:span text:style-name="T32">ИВС</text:span></text:p>
          </table:table-cell>
          <table:table-cell office:value-type="string" table:style-name="Cell13">
            <text:p co:para-mark-style-name="T32" text:style-name="P35"/>
          </table:table-cell>
        </table:table-row>
        <table:table-row>
          <table:table-cell office:value-type="string" table:style-name="Cell5">
            <text:p co:para-mark-style-name="T8" text:style-name="P33"><text:span text:style-name="T8">1TK80T02B1</text:span></text:p>
            <text:p co:para-mark-style-name="T3" text:style-name="P33"><text:span text:style-name="T8">1ГА</text:span><text:span text:style-name="T8">306/3</text:span></text:p>
          </table:table-cell>
          <table:table-cell office:value-type="string" table:style-name="Cell7">
            <text:h co:para-mark-style-name="T3" text:outline-level="7" text:style-name="P34"><text:span text:style-name="T3">«Т» продувочной воды после доохладителя продувки 1</text:span><text:span text:style-name="T3">TK</text:span><text:span text:style-name="T3">80</text:span><text:span text:style-name="T3">W</text:span><text:span text:style-name="T3">02</text:span></text:h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h co:para-mark-style-name="T3" text:outline-level="7" text:style-name="P34"><text:span text:style-name="T3">ИРТ</text:span><text:span text:style-name="T3"><text:s text:c="1"/></text:span><text:span text:style-name="T3">1730D</text:span><text:span text:style-name="T3">/</text:span><text:span text:style-name="T3">A <text:s text:c="1"/></text:span></text:h>
            <text:h co:para-mark-style-name="T3" text:outline-level="7" text:style-name="P34"><text:span text:style-name="T3">(0-150)</text:span><text:span text:style-name="T3"><text:s text:c="1"/></text:span><text:span text:style-name="T43">о</text:span><text:span text:style-name="T3">С</text:span></text:h>
          </table:table-cell>
          <table:table-cell office:value-type="string" table:style-name="Cell7">
            <text:h co:para-mark-style-name="T3" text:outline-level="7" text:style-name="P34"><text:span text:style-name="T3">1HZ04</text:span></text:h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7">
            <text:h co:para-mark-style-name="T3" text:outline-level="7" text:style-name="P34"><text:span text:style-name="T3">1</text:span><text:span text:style-name="T3">HZ62/25</text:span></text:h>
          </table:table-cell>
          <table:table-cell office:value-type="string" table:style-name="Cell13">
            <text:p co:para-mark-style-name="T3" text:style-name="P2"><text:span text:style-name="T32">T </text:span><text:span text:style-name="T37">&gt;</text:span><text:span text:style-name="T32"><text:s text:c="1"/>100</text:span></text:p>
          </table:table-cell>
          <table:table-cell office:value-type="string" table:style-name="Cell5">
            <text:p co:para-mark-style-name="T3" text:style-name="P2"><text:span text:style-name="T32">1</text:span><text:span text:style-name="T32">TKF02</text:span><text:span text:style-name="T32">, сигн.</text:span></text:p>
          </table:table-cell>
          <table:table-cell office:value-type="string" table:style-name="Cell13">
            <text:p co:para-mark-style-name="T32" text:style-name="P35"/>
          </table:table-cell>
        </table:table-row>
        <table:table-row>
          <table:table-cell office:value-type="string" table:style-name="Cell5">
            <text:p co:para-mark-style-name="T8" text:style-name="P33"><text:span text:style-name="T8">1TK80T03B1</text:span></text:p>
            <text:p co:para-mark-style-name="T3" text:style-name="P33"><text:span text:style-name="T8">1ГА</text:span><text:span text:style-name="T8">306/3</text:span></text:p>
          </table:table-cell>
          <table:table-cell office:value-type="string" table:style-name="Cell7">
            <text:h co:para-mark-style-name="T3" text:outline-level="7" text:style-name="P34"><text:span text:style-name="T3">«Т» продувочной воды после доохладителя продувки 1</text:span><text:span text:style-name="T3">TK</text:span><text:span text:style-name="T3">80</text:span><text:span text:style-name="T3">W</text:span><text:span text:style-name="T3">02</text:span></text:h>
          </table:table-cell>
          <table:table-cell office:value-type="string" table:style-name="Cell14">
            <text:h co:para-mark-style-name="T3" text:outline-level="7" text:style-name="P34"><text:span text:style-name="T3">ТС гр. 50П</text:span></text:h>
            <text:h co:para-mark-style-name="T3" text:outline-level="7" text:style-name="P34"><text:span text:style-name="T3">ИРТ</text:span><text:span text:style-name="T3"><text:s text:c="1"/></text:span><text:span text:style-name="T3">1730D</text:span><text:span text:style-name="T3">/</text:span><text:span text:style-name="T3">A <text:s text:c="1"/></text:span></text:h>
            <text:h co:para-mark-style-name="T3" text:outline-level="7" text:style-name="P34"><text:span text:style-name="T3">(0-150)</text:span><text:span text:style-name="T3"><text:s text:c="1"/></text:span><text:span text:style-name="T43">о</text:span><text:span text:style-name="T3">С</text:span></text:h>
          </table:table-cell>
          <table:table-cell office:value-type="string" table:style-name="Cell7">
            <text:h co:para-mark-style-name="T3" text:outline-level="7" text:style-name="P34"><text:span text:style-name="T3">1HZ04</text:span></text:h>
          </table:table-cell>
          <table:table-cell office:value-type="string" table:style-name="Cell5">
            <text:p co:para-mark-style-name="T32" text:style-name="P2"><text:span text:style-name="T32">─</text:span></text:p>
          </table:table-cell>
          <table:table-cell office:value-type="string" table:style-name="Cell7">
            <text:h co:para-mark-style-name="T3" text:outline-level="7" text:style-name="P34"><text:span text:style-name="T3">1</text:span><text:span text:style-name="T3">HZ62/26</text:span></text:h>
          </table:table-cell>
          <table:table-cell office:value-type="string" table:style-name="Cell13">
            <text:p co:para-mark-style-name="T3" text:style-name="P2"><text:span text:style-name="T32">T </text:span><text:span text:style-name="T37">&gt;</text:span><text:span text:style-name="T32"><text:s text:c="1"/>100</text:span></text:p>
          </table:table-cell>
          <table:table-cell office:value-type="string" table:style-name="Cell5">
            <text:p co:para-mark-style-name="T3" text:style-name="P2"><text:span text:style-name="T32">1</text:span><text:span text:style-name="T32">TKF02</text:span></text:p>
          </table:table-cell>
          <table:table-cell office:value-type="string" table:style-name="Cell13">
            <text:p co:para-mark-style-name="T32" text:style-name="P35"/>
          </table:table-cell>
        </table:table-row>
      </table:table>
      <text:p co:para-mark-style-name="T23" text:style-name="P28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ourier New" svg:font-family="Courier New"/>
    <style:font-face style:name="Liberation Mono" svg:font-family="Liberation Mono"/>
    <style:font-face style:name="PT Astra Serif" svg:font-family="PT Astra Serif"/>
    <style:font-face style:name="Tahoma" svg:font-family="Tahoma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orphans="2" fo:text-align="start" fo:text-indent="0pt" fo:widows="2" style:tab-stop-distance="36pt"/>
      <style:text-properties fo:background-color="transparent" fo:color="#000000" fo:font-family="PT Astra Serif" fo:font-size="12pt" fo:letter-spacing="0pt" style:font-name="PT Astra Serif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7" style:display-name="Heading 7" style:family="paragraph" style:list-style-name="" style:name="Heading_7" style:next-style-name="Standard" style:parent-style-name="Standard">
      <style:paragraph-properties fo:keep-with-next="always" fo:orphans="2" fo:text-align="center" fo:widows="2"/>
      <style:text-properties fo:font-size="12pt" style:font-size-asian="12pt" style:font-size-complex="12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orphans="2" fo:widows="2"/>
      <style:text-properties fo:font-family="Times New Roman" fo:font-size="10pt" style:font-name="Times New Roman" style:font-size-asian="10pt" style:font-size-complex="10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keep-with-next="always" fo:orphans="2" fo:text-align="center" fo:widows="2"/>
      <style:text-properties fo:color="#FF0000" fo:font-size="12pt" style:font-size-asian="12pt" style:font-size-complex="12pt">
        <co:theme-color>
          <value>
            <rgba>FF0000FF</rgba>
          </value>
        </co:theme-color>
      </style:text-properties>
    </style:style>
    <style:style style:display-name="Heading" style:family="paragraph" style:name="Heading" style:next-style-name="Standard" style:parent-style-name="Standard">
      <style:paragraph-properties fo:orphans="2" fo:text-align="center" fo:widows="2"/>
      <style:text-properties fo:font-size="14pt" style:font-size-asian="14pt" style:font-size-complex="14pt"/>
    </style:style>
    <style:style style:display-name="Текст выноски Знак" style:family="paragraph" style:name="Текст_выноски_Знак">
      <style:text-properties fo:font-family="Tahoma" fo:font-size="8pt" style:font-name="Tahoma" style:font-size-asian="8pt" style:font-size-complex="8pt"/>
    </style:style>
    <style:style style:display-name="Основной шрифт абзаца" style:family="paragraph" style:name="Основной_шрифт_абзаца"/>
    <style:style style:display-name="ListLabel 8" style:family="paragraph" style:name="ListLabel_8"/>
    <style:style style:display-name="ListLabel 3" style:family="paragraph" style:name="ListLabel_3"/>
    <style:style style:display-name="Текст выноски" style:family="paragraph" style:name="Текст_выноски" style:next-style-name="Standard" style:parent-style-name="Standard">
      <style:text-properties fo:font-family="Tahoma" fo:font-size="8pt" style:font-name="Tahoma" style:font-size-asian="8pt" style:font-size-complex="8pt"/>
    </style:style>
    <style:style style:display-name="ListLabel 5" style:family="paragraph" style:name="ListLabel_5"/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Text body" style:family="paragraph" style:name="Text_body" style:next-style-name="Standard" style:parent-style-name="Standard">
      <style:paragraph-properties fo:line-height="115%" fo:margin-bottom="7.0016pt" fo:margin-top="0pt" fo:orphans="2" fo:widows="2" loext:contextual-spacing="false"/>
    </style:style>
    <style:style style:display-name="Table Contents" style:family="paragraph" style:name="Table_Contents" style:next-style-name="Standard" style:parent-style-name="Standard">
      <style:paragraph-properties fo:orphans="0" fo:widows="0"/>
    </style:style>
    <style:style style:display-name="Header" style:family="paragraph" style:name="Header" style:next-style-name="Standard" style:parent-style-name="Standard">
      <style:paragraph-properties>
        <style:tab-stops>
          <style:tab-stop style:leader-style="none" style:position="207.6379pt" style:type="center"/>
          <style:tab-stop style:leader-style="none" style:position="415.3042pt" style:type="right"/>
        </style:tab-stops>
      </style:paragraph-properties>
    </style:style>
    <style:style style:display-name="ListLabel 9" style:family="paragraph" style:name="ListLabel_9"/>
    <style:style style:display-name="Preformatted Text" style:family="paragraph" style:name="Preformatted_Text" style:next-style-name="Standard" style:parent-style-name="Standard">
      <style:paragraph-properties fo:margin-bottom="0pt" fo:margin-top="0pt" fo:orphans="2" fo:widows="2" loext:contextual-spacing="false"/>
      <style:text-properties fo:font-family="Liberation Mono" fo:font-size="10pt" style:font-name="Liberation Mono" style:font-size-asian="10pt" style:font-size-complex="10pt"/>
    </style:style>
    <style:style style:display-name="Table Heading" style:family="paragraph" style:name="Table_Heading" style:next-style-name="Table_Contents" style:parent-style-name="Table_Contents">
      <style:paragraph-properties fo:orphans="2" fo:text-align="center" fo:widows="2"/>
      <style:text-properties fo:font-weight="bold" style:font-weight-asian="bold" style:font-weight-complex="bold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keep-with-next="always" fo:orphans="2" fo:text-align="center" fo:widows="2"/>
      <style:text-properties fo:font-size="11pt" fo:font-weight="bold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keep-with-next="always"/>
      <style:text-properties fo:font-size="12pt" style:font-size-asian="12pt" style:font-size-complex="12pt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ListLabel 1" style:family="paragraph" style:name="ListLabel_1"/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 style:next-style-name="Standard" style:parent-style-name="Standard">
      <style:paragraph-properties>
        <style:tab-stops>
          <style:tab-stop style:leader-style="none" style:position="240.945pt" style:type="center"/>
          <style:tab-stop style:leader-style="none" style:position="481.89pt" style:type="right"/>
        </style:tab-stops>
      </style:paragraph-properties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List" style:family="paragraph" style:name="List" style:next-style-name="Text_body" style:parent-style-name="Text_body">
      <style:text-properties fo:font-family="PT Astra Serif" style:font-name="PT Astra Serif"/>
    </style:style>
    <style:style style:display-name="Footer" style:family="paragraph" style:name="Footer" style:next-style-name="Standard" style:parent-style-name="Standard">
      <style:paragraph-properties>
        <style:tab-stops>
          <style:tab-stop style:leader-style="none" style:position="207.6379pt" style:type="center"/>
          <style:tab-stop style:leader-style="none" style:position="415.3042pt" style:type="right"/>
        </style:tab-stops>
      </style:paragraph-properties>
    </style:style>
    <style:style style:display-name="ListLabel 6" style:family="paragraph" style:name="ListLabel_6"/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aption" style:family="paragraph" style:name="Caption" style:next-style-name="Standard" style:parent-style-name="Standard">
      <style:paragraph-properties fo:margin-bottom="6.0095pt" fo:margin-top="6.0095pt" fo:orphans="2" fo:widows="2" loext:contextual-spacing="false"/>
      <style:text-properties fo:font-family="PT Astra Serif" fo:font-size="12pt" fo:font-style="italic" style:font-name="PT Astra Serif" style:font-size-asian="12pt" style:font-size-complex="12pt" style:font-style-asian="italic" style:font-style-complex="italic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7" style:family="paragraph" style:name="ListLabel_7"/>
    <style:style style:display-name="ListLabel 4" style:family="paragraph" style:name="ListLabel_4"/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Index" style:family="paragraph" style:name="Index" style:next-style-name="Standard" style:parent-style-name="Standard">
      <style:text-properties fo:font-family="PT Astra Serif" style:font-name="PT Astra Serif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keep-with-next="always" fo:orphans="2" fo:text-align="end" fo:widows="2"/>
      <style:text-properties fo:font-size="12pt" style:font-size-asian="12pt" style:font-size-complex="12pt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keep-with-next="always" fo:orphans="2" fo:text-align="center" fo:widows="2"/>
      <style:text-properties fo:font-size="12pt" fo:font-weight="bold" style:font-size-asian="12pt" style:font-size-complex="12pt" style:font-weight-asian="bold" style:font-weight-complex="bold"/>
    </style:style>
    <style:style style:display-name="ListLabel 2" style:family="paragraph" style:name="ListLabel_2"/>
    <style:style style:display-name="Numbering Symbols" style:family="paragraph" style:name="Numbering_Symbols"/>
    <style:style style:display-name="Page Number" style:family="paragraph" style:name="Page_Number" style:next-style-name="Основной_шрифт_абзаца" style:parent-style-name="Основной_шрифт_абзаца"/>
    <style:style style:display-name="Text" style:family="paragraph" style:name="Text" style:next-style-name="Standard" style:parent-style-name="Standard">
      <style:text-properties fo:font-family="Courier New" style:font-name="Courier New"/>
    </style:style>
    <style:style style:default-outline-level="6" style:display-name="Heading 6" style:family="paragraph" style:list-style-name="" style:name="Heading_6" style:next-style-name="Standard" style:parent-style-name="Standard">
      <style:paragraph-properties fo:keep-with-next="always" fo:orphans="2" fo:text-align="center" fo:widows="2"/>
      <style:text-properties fo:color="#0000FF" fo:font-size="12pt" style:font-size-asian="12pt" style:font-size-complex="12pt">
        <co:theme-color>
          <value>
            <rgba>0000FFFF</rgba>
          </value>
        </co:theme-color>
      </style:text-properties>
    </style:style>
    <text:list-style style:name="numList_1">
      <text:list-level-style-bullet co:is-empty-bullet="true" co:list-bullet-text="" text:bullet-char=" " text:level="1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2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3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4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5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6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7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8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bullet co:is-empty-bullet="true" co:list-bullet-text="" text:bullet-char=" " text:level="9">
        <style:list-level-properties text:list-level-position-and-space-mode="label-alignment">
          <style:list-level-label-alignment text:label-followed-by="nothing"/>
        </style:list-level-properties>
      </text:list-level-style-bullet>
    </text:list-style>
    <text:notes-configuration co:endnotes-position="document-end" style:num-format="i" text:note-class="endnote" text:start-numbering-at="document"/>
  </office:styles>
  <office:automatic-styles>
    <style:style style:family="paragraph" style:name="P40" style:parent-style-name="Standard"/>
    <style:style style:family="paragraph" style:name="P39" style:parent-style-name="Footer">
      <style:paragraph-properties fo:margin-left="-22.7055pt" fo:margin-right="0pt" fo:orphans="2" fo:text-align="start" fo:text-indent="0pt" fo:widows="2">
        <style:tab-stops>
          <style:tab-stop co:tab-stop-absolute-position="184.9324pt" style:leader-style="none" style:position="207.6379pt" style:type="center"/>
          <style:tab-stop co:tab-stop-absolute-position="392.5987pt" style:leader-style="none" style:position="415.3042pt" style:type="right"/>
        </style:tab-stops>
      </style:paragraph-properties>
    </style:style>
    <style:style style:family="text" style:name="T46">
      <style:text-properties fo:font-family="Times New Roman" fo:font-size="12pt" fo:font-style="normal" style:font-name="Times New Roman" style:font-size-asian="12pt" style:font-size-complex="12pt" style:font-style-asian="normal" style:font-style-complex="normal"/>
    </style:style>
    <style:style style:family="text" style:name="T45">
      <style:text-properties fo:font-family="PT Astra Serif" fo:font-size="12pt" style:font-name="PT Astra Serif" style:font-size-asian="12pt" style:font-size-complex="12pt"/>
    </style:style>
    <style:style style:family="text" style:name="T44">
      <style:text-properties fo:font-size="12pt" style:font-size-asian="12pt" style:font-size-complex="12pt"/>
    </style:style>
    <style:page-layout style:name="PM1">
      <style:page-layout-properties fo:margin-bottom="36.5103pt" fo:margin-left="56.6929pt" fo:margin-right="56.6929pt" fo:margin-top="54.3969pt" fo:page-height="595.3043pt" fo:page-width="841.8903pt" style:num-format="1" style:print-orientation="landscape">
        <style:footnote-sep style:adjustment="left" style:color="#000000" style:distance-after-sep="2.863pt" style:distance-before-sep="2.863pt" style:line-style="solid" style:rel-width="25%" style:width="0.018cm"/>
      </style:page-layout-properties>
      <style:footer-style>
        <style:header-footer-properties fo:margin-top="0pt" fo:min-height="0.039764in"/>
      </style:footer-style>
    </style:page-layout>
    <style:style style:family="graphic" style:name="Frm4">
      <style:graphic-properties draw:auto-grow-height="false" draw:auto-grow-width="false" draw:fill="solid" draw:fill-color="#FFFFFF" draw:fit-to-size="false" draw:opacity="100%" draw:stroke="solid" draw:textarea-horizontal-align="justify" draw:textarea-vertical-align="middle" fo:margin-bottom="0pt" fo:margin-left="9.0425pt" fo:margin-right="9.0425pt" fo:margin-top="0pt" fo:padding-bottom="6.4913pt" fo:padding-left="12.5008pt" fo:padding-right="12.5008pt" fo:padding-top="6.4913pt" fo:wrap-option="no-wrap" style:horizontal-pos="from-left" style:horizontal-rel="paragraph" style:mirror="none" style:run-through="background" style:vertical-pos="from-top" style:vertical-rel="paragraph" style:wrap="run-through" svg:stroke-color="#000000" svg:stroke-opacity="100%" svg:stroke-width="0.737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</office:automatic-styles>
  <office:master-styles>
    <style:master-page co:use-title-header-footer="false" style:name="Standard" style:page-layout-name="PM1">
      <style:header style:display="false"/>
      <style:footer>
        <text:tracked-changes text:track-changes="false"/>
        <text:p co:para-mark-style-name="T44" text:style-name="P39"><draw:custom-shape draw:style-name="Frm4" draw:text-style-name="P40" draw:transform=" rotate (-1.570796326794897) translate (763.0504pt -0.4pt)" svg:height="18.6236pt" svg:width="18.8787pt" text:anchor-type="paragraph"><text:p text:style-name="Standard"><text:span text:style-name="T45"><text:s text:c="1"/></text:span><text:span text:style-name="T46">5</text:span></text:p><draw:enhanced-geometry draw:enhanced-path="M 0 0 U 10800 10800 10800 10800 0 360 Z N" draw:mirror-horizontal="false" draw:mirror-vertical="false" draw:modifiers="" draw:text-areas="?ODFTextRectL ?ODFTextRectT ?ODFTextRectR ?ODFTextRectB" draw:type="custom-ellipse" svg:viewBox="0 0 21600 21600"><draw:equation draw:formula="3163" draw:name="ODFTextRectL"/><draw:equation draw:formula="3163" draw:name="ODFTextRectT"/><draw:equation draw:formula="18437" draw:name="ODFTextRectR"/><draw:equation draw:formula="18437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text:span text:style-name="T44"><text:page-number/></text:span></text:p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Linux/40-1423.1132.10496.1056.1@79759041c8ea4f7d73e69cee2260346cb3e9bfd5</meta:generator>
    <meta:creation-date>2002-07-15T14:14:00</meta:creation-date>
    <dc:date>2026-06-02T10:34:39</dc:date>
  </office:meta>
</office:document-meta>
</file>

<file path=themes.xml><?xml version="1.0" encoding="utf-8"?>
<co:themes xmlns:a="http://schemas.openxmlformats.org/drawingml/2006/main" xmlns:a14="http://schemas.microsoft.com/office/drawing/2010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